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VersionList.xml" manifest:media-type=""/>
  <manifest:file-entry manifest:full-path="meta.xml" manifest:media-type="text/xml"/>
  <manifest:file-entry manifest:full-path="settings.xml" manifest:media-type="text/xml"/>
  <manifest:file-entry manifest:full-path="ObjectReplacements/Object 1" manifest:media-type=""/>
  <manifest:file-entry manifest:full-path="Thumbnails/thumbnail.png" manifest:media-type="image/png"/>
  <manifest:file-entry manifest:full-path="content.xml" manifest:media-type="text/xml"/>
  <manifest:file-entry manifest:full-path="Versions/Version2" manifest:media-type=""/>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625in" table:align="left"/>
    </style:style>
    <style:style style:name="Table1.A" style:family="table-column">
      <style:table-column-properties style:column-width="1.7736in"/>
    </style:style>
    <style:style style:name="Table1.B" style:family="table-column">
      <style:table-column-properties style:column-width="3.6889in"/>
    </style:style>
    <style:style style:name="Table1.A1" style:family="table-cell">
      <style:table-cell-properties style:vertical-align="middle" fo:padding="0.0194in" fo:border="none"/>
    </style:style>
    <style:style style:name="Table2" style:family="table">
      <style:table-properties style:width="5.1181in" table:align="left"/>
    </style:style>
    <style:style style:name="Table2.A" style:family="table-column">
      <style:table-column-properties style:column-width="1.784in"/>
    </style:style>
    <style:style style:name="Table2.B" style:family="table-column">
      <style:table-column-properties style:column-width="3.334in"/>
    </style:style>
    <style:style style:name="Table2.A1" style:family="table-cell">
      <style:table-cell-properties style:vertical-align="middle" fo:padding="0.0194in" fo:border="none"/>
    </style:style>
    <style:style style:name="P1" style:family="paragraph" style:parent-style-name="Standard">
      <style:paragraph-properties fo:margin-left="0in" fo:margin-right="0in" fo:text-indent="0in"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paragraph-properties fo:margin-left="0in" fo:margin-right="0in" fo:text-indent="0in" style:auto-text-indent="false"/>
    </style:style>
    <style:style style:name="P6" style:family="paragraph" style:parent-style-name="Standard">
      <style:paragraph-properties fo:margin-top="0in" fo:margin-bottom="0.1965in" style:contextual-spacing="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list-style-name="L5"/>
    <style:style style:name="P9" style:family="paragraph" style:parent-style-name="Text_20_body">
      <style:paragraph-properties fo:margin-top="0in" fo:margin-bottom="0in" style:contextual-spacing="false"/>
    </style:style>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paragraph-properties fo:margin-left="0in" fo:margin-right="0in" fo:margin-top="0in" fo:margin-bottom="0.1665in" style:contextual-spacing="false" fo:orphans="1" fo:text-indent="0in" style:auto-text-indent="false"/>
    </style:style>
    <style:style style:name="P26" style:family="paragraph" style:parent-style-name="Text_20_body">
      <style:paragraph-properties fo:margin-left="0.1665in" fo:margin-right="0.1665in" fo:margin-top="0in" fo:margin-bottom="0.1665in" style:contextual-spacing="false" fo:orphans="1" fo:text-indent="0in" style:auto-text-indent="false"/>
    </style:style>
    <style:style style:name="P27" style:family="paragraph" style:parent-style-name="Text_20_body">
      <style:paragraph-properties fo:margin-top="0in" fo:margin-bottom="0.1665in" style:contextual-spacing="false" fo:orphans="1"/>
    </style:style>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Preformatted_20_Text">
      <style:paragraph-properties fo:margin-left="0in" fo:margin-right="0in" fo:text-indent="0in" style:auto-text-indent="false"/>
    </style:style>
    <style:style style:name="P32" style:family="paragraph" style:parent-style-name="Preformatted_20_Text">
      <style:paragraph-properties fo:margin-top="0in" fo:margin-bottom="0.1965in" style:contextual-spacing="false"/>
    </style:style>
    <style:style style:name="P33" style:family="paragraph" style:parent-style-name="Text_20_body" style:list-style-name="L24"/>
    <style:style style:name="P34" style:family="paragraph" style:parent-style-name="Text_20_body" style:list-style-name="L25"/>
    <style:style style:name="P35" style:family="paragraph" style:parent-style-name="Preformatted_20_Text">
      <style:paragraph-properties fo:margin-left="0in" fo:margin-right="0in" fo:margin-top="0in" fo:margin-bottom="0.1965in" style:contextual-spacing="false" fo:text-indent="0in" style:auto-text-indent="false"/>
    </style:style>
    <style:style style:name="P36" style:family="paragraph" style:parent-style-name="Text_20_body" style:list-style-name="L26">
      <style:paragraph-properties fo:margin-left="0in" fo:margin-right="0in" fo:text-indent="0in" style:auto-text-indent="false"/>
    </style:style>
    <style:style style:name="P37" style:family="paragraph" style:parent-style-name="Text_20_body" style:list-style-name="L27">
      <style:paragraph-properties fo:margin-left="0in" fo:margin-right="0in" fo:text-indent="0in" style:auto-text-indent="false"/>
    </style:style>
    <style:style style:name="P38" style:family="paragraph" style:parent-style-name="Text_20_body" style:list-style-name="L27"/>
    <style:style style:name="P39" style:family="paragraph" style:parent-style-name="Text_20_body" style:list-style-name="L28"/>
    <style:style style:name="P40" style:family="paragraph" style:parent-style-name="Text_20_body" style:list-style-name="L29">
      <style:paragraph-properties fo:margin-left="0in" fo:margin-right="0in" fo:text-indent="0in" style:auto-text-indent="false"/>
    </style:style>
    <style:style style:name="P41" style:family="paragraph" style:parent-style-name="Text_20_body" style:list-style-name="L29"/>
    <style:style style:name="P42" style:family="paragraph" style:parent-style-name="Text_20_body" style:list-style-name="L30">
      <style:paragraph-properties fo:margin-left="0in" fo:margin-right="0in" fo:text-indent="0in" style:auto-text-indent="false"/>
    </style:style>
    <style:style style:name="P43" style:family="paragraph" style:parent-style-name="Text_20_body" style:list-style-name="L31"/>
    <style:style style:name="P44" style:family="paragraph" style:parent-style-name="Text_20_body" style:list-style-name="L32"/>
    <style:style style:name="P45" style:family="paragraph" style:parent-style-name="Text_20_body" style:list-style-name="L33"/>
    <style:style style:name="P46" style:family="paragraph" style:parent-style-name="Text_20_body" style:list-style-name="L34"/>
    <style:style style:name="P47" style:family="paragraph" style:parent-style-name="Text_20_body" style:list-style-name="L35"/>
    <style:style style:name="P48" style:family="paragraph" style:parent-style-name="Text_20_body" style:list-style-name="L36"/>
    <style:style style:name="P49" style:family="paragraph" style:parent-style-name="Text_20_body" style:list-style-name="L37"/>
    <style:style style:name="P50" style:family="paragraph" style:parent-style-name="Text_20_body" style:list-style-name="L38"/>
    <style:style style:name="P51" style:family="paragraph" style:parent-style-name="Text_20_body" style:list-style-name="L39"/>
    <style:style style:name="P52" style:family="paragraph" style:parent-style-name="Text_20_body" style:list-style-name="L40"/>
    <style:style style:name="P53" style:family="paragraph" style:parent-style-name="Text_20_body" style:list-style-name="L41"/>
    <style:style style:name="P54" style:family="paragraph" style:parent-style-name="Text_20_body" style:list-style-name="L42"/>
    <style:style style:name="P55" style:family="paragraph" style:parent-style-name="Text_20_body" style:list-style-name="L43"/>
    <style:style style:name="P56" style:family="paragraph" style:parent-style-name="Text_20_body" style:list-style-name="L44"/>
    <style:style style:name="P57" style:family="paragraph" style:parent-style-name="Text_20_body" style:list-style-name="L45"/>
    <style:style style:name="P58" style:family="paragraph" style:parent-style-name="Text_20_body" style:list-style-name="L46"/>
    <style:style style:name="P59" style:family="paragraph" style:parent-style-name="Text_20_body" style:list-style-name="L47"/>
    <style:style style:name="P60" style:family="paragraph" style:parent-style-name="Heading_20_1">
      <style:paragraph-properties fo:margin-left="0in" fo:margin-right="0in" fo:text-indent="0in" style:auto-text-indent="false"/>
    </style:style>
    <style:style style:name="P61" style:family="paragraph" style:parent-style-name="Text_20_body">
      <style:paragraph-properties fo:margin-left="0in" fo:margin-right="0in" fo:margin-top="0in" fo:margin-bottom="0in" style:contextual-spacing="false" fo:text-indent="0in" style:auto-text-indent="false"/>
    </style:style>
    <style:style style:name="P62" style:family="paragraph" style:parent-style-name="Standard">
      <style:paragraph-properties fo:margin-left="0in" fo:margin-right="0in" fo:text-indent="0in" style:auto-text-indent="false"/>
      <style:text-properties officeooo:rsid="001df639" officeooo:paragraph-rsid="001df639"/>
    </style:style>
    <style:style style:name="fr1" style:family="graphic" style:parent-style-name="OLE">
      <style:graphic-properties fo:margin-left="0in" fo:margin-right="0in" fo:margin-top="0in" fo:margin-bottom="0in" style:vertical-pos="top" style:vertical-rel="baseline" fo:padding="0in" fo:border="none" draw:frame-display-border="tru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text:start-value="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stage-slideover-sidebar">
        <text:section text:style-name="Sect1" text:name="sidebar-header">
          <text:p text:style-name="P1"><text:a xlink:type="simple" xlink:href="https://chatgpt.com/" text:style-name="Internet_20_link" text:visited-style-name="Visited_20_Internet_20_Link">ChatGPT</text:a></text:p>
        </text:section>
        <text:list text:style-name="L1">
          <text:list-item>
            <text:p text:style-name="P2"/>
          </text:list-item>
        </text:list>
        <text:list text:style-name="L2">
          <text:list-item>
            <text:p text:style-name="P3"/>
          </text:list-item>
        </text:list>
        <text:list text:style-name="L3">
          <text:list-item>
            <text:p text:style-name="P4"/>
          </text:list-item>
        </text:list>
        <text:section text:style-name="Sect1" text:name="history">
          <text:list text:style-name="L4">
            <text:list-item>
              <text:p text:style-name="P5"/>
            </text:list-item>
          </text:list>
        </text:section>
      </text:section>
      <text:section text:style-name="Sect1" text:name="thread">
        <text:p text:style-name="P1">we need to create stem research for GGTC Gabriel Global Technical Corporation on March 31st 2026 GGTC.info Quibhoball.com and GGTCUNIVERSE.com on the header for me and create </text:p>
        <text:p text:style-name="P6"/>
        <text:p text:style-name="P7">Created the document.</text:p>
        <text:p text:style-name="Text_20_body">It includes the header with:</text:p>
        <text:list text:style-name="L5">
          <text:list-item>
            <text:p text:style-name="P8">GGTC Gabriel Global Technical Corporation</text:p>
          </text:list-item>
          <text:list-item>
            <text:p text:style-name="P8">March 31, 2026</text:p>
          </text:list-item>
          <text:list-item>
            <text:p text:style-name="P8">GGTC.info</text:p>
          </text:list-item>
          <text:list-item>
            <text:p text:style-name="P8">Quibhoball.com</text:p>
          </text:list-item>
          <text:list-item>
            <text:p text:style-name="P8">GGTCUNIVERSE.com</text:p>
          </text:list-item>
        </text:list>
        <text:p text:style-name="Text_20_body">If you want, I can next turn this into a longer formal research packet or a branded cover version.</text:p>
        <text:p text:style-name="P9"/>
        <text:p text:style-name="P9">If you want, I can next turn this into a longer formal research packet or a branded cover version.</text:p>
        <text:p text:style-name="Text_20_body"/>
        <text:p text:style-name="Text_20_body">Understood. I’ll move this forward into a <text:span text:style-name="Strong_20_Emphasis">formal STEM research packet with a branded structure</text:span>. Below is a clean, expandable framework you can use immediately, plus a drafted front section.</text:p>
        <text:p text:style-name="Horizontal_20_Line"/>
        <text:h text:style-name="Heading_20_1" text:outline-level="1"><text:span text:style-name="Strong_20_Emphasis">GGTC STEM RESEARCH PACKET (STRUCTURE)</text:span></text:h>
        <text:h text:style-name="Heading_20_2" text:outline-level="2"><text:span text:style-name="Strong_20_Emphasis">1. Cover Page (Branded)</text:span></text:h>
        <text:p text:style-name="Text_20_body"><text:span text:style-name="Strong_20_Emphasis">Header (already included):</text:span></text:p>
        <text:list text:style-name="L6">
          <text:list-item>
            <text:p text:style-name="P10">GGTC Gabriel Global Technical Corporation</text:p>
          </text:list-item>
          <text:list-item>
            <text:p text:style-name="P10">March 31, 2026</text:p>
          </text:list-item>
          <text:list-item>
            <text:p text:style-name="P10">GGTC.info | Quibhoball.com | GGTCUNIVERSE.com</text:p>
          </text:list-item>
        </text:list>
        <text:p text:style-name="Text_20_body"><text:span text:style-name="Strong_20_Emphasis">Title:</text:span></text:p>
        <text:p text:style-name="Quotations"><text:soft-page-break/><text:span text:style-name="Emphasis">GGTC STEM Research Initiative — Systems, Infrastructure, and Integrated Technical Development</text:span></text:p>
        <text:p text:style-name="Text_20_body"><text:span text:style-name="Strong_20_Emphasis">Optional Subheading:</text:span></text:p>
        <text:p text:style-name="Quotations">A multi-domain research framework across cybersecurity, infrastructure systems, and applied technical innovation</text:p>
        <text:p text:style-name="Horizontal_20_Line"/>
        <text:h text:style-name="Heading_20_2" text:outline-level="2"><text:span text:style-name="Strong_20_Emphasis">2. Executive Summary</text:span></text:h>
        <text:p text:style-name="Text_20_body"><text:span text:style-name="Strong_20_Emphasis">Purpose:</text:span><text:line-break/>A concise overview of what GGTC is researching and why it matters.</text:p>
        <text:p text:style-name="Text_20_body"><text:span text:style-name="Strong_20_Emphasis">Draft:</text:span><text:line-break/>GGTC (Gabriel Global Technical Corporation) is developing a structured STEM research initiative focused on integrated systems architecture, cybersecurity, infrastructure design, and educational alignment. This initiative operates as a multi-domain framework intended to support long-horizon technical development, institutional-grade systems thinking, and scalable knowledge infrastructure.</text:p>
        <text:p text:style-name="Text_20_body">The research aligns with GGTC’s operational model, emphasizing structured data, layered governance, and controlled system expansion. Domains include cybersecurity, digital infrastructure, applied mathematics, systems engineering, and emerging technical ecosystems connected to GGTC.info, Quibhoball.com, and GGTCUNIVERSE.com.</text:p>
        <text:p text:style-name="Horizontal_20_Line"/>
        <text:h text:style-name="Heading_20_2" text:outline-level="2"><text:span text:style-name="Strong_20_Emphasis">3. Research Objectives</text:span></text:h>
        <text:list text:style-name="L7">
          <text:list-item>
            <text:p text:style-name="P11">Establish a <text:span text:style-name="Strong_20_Emphasis">STEM-aligned research foundation</text:span> within GGTC</text:p>
          </text:list-item>
          <text:list-item>
            <text:p text:style-name="P11">Develop <text:span text:style-name="Strong_20_Emphasis">cybersecurity and infrastructure frameworks</text:span></text:p>
          </text:list-item>
          <text:list-item>
            <text:p text:style-name="P11">Support <text:span text:style-name="Strong_20_Emphasis">educational pathways</text:span> tied to real-world systems</text:p>
          </text:list-item>
          <text:list-item>
            <text:p text:style-name="P11">Create <text:span text:style-name="Strong_20_Emphasis">scalable technical architectures</text:span></text:p>
          </text:list-item>
          <text:list-item>
            <text:p text:style-name="P11">Maintain <text:span text:style-name="Strong_20_Emphasis">structured documentation and archival integrity</text:span></text:p>
          </text:list-item>
        </text:list>
        <text:p text:style-name="Horizontal_20_Line"/>
        <text:h text:style-name="Heading_20_2" text:outline-level="2"><text:span text:style-name="Strong_20_Emphasis">4. Core Research Domains</text:span></text:h>
        <text:h text:style-name="Heading_20_3" text:outline-level="3"><text:span text:style-name="Strong_20_Emphasis">4.1 Cybersecurity</text:span></text:h>
        <text:list text:style-name="L8">
          <text:list-item>
            <text:p text:style-name="P12">Network security architecture</text:p>
          </text:list-item>
          <text:list-item>
            <text:p text:style-name="P12">Threat modeling and system resilience</text:p>
          </text:list-item>
          <text:list-item>
            <text:p text:style-name="P12">Access control systems and data protection</text:p>
          </text:list-item>
        </text:list>
        <text:h text:style-name="Heading_20_3" text:outline-level="3"><text:soft-page-break/><text:span text:style-name="Strong_20_Emphasis">4.2 Systems Architecture</text:span></text:h>
        <text:list text:style-name="L9">
          <text:list-item>
            <text:p text:style-name="P13">Layered system design (governance, technical, operational)</text:p>
          </text:list-item>
          <text:list-item>
            <text:p text:style-name="P13">Infrastructure modeling</text:p>
          </text:list-item>
          <text:list-item>
            <text:p text:style-name="P13">Interconnected system frameworks</text:p>
          </text:list-item>
        </text:list>
        <text:h text:style-name="Heading_20_3" text:outline-level="3"><text:span text:style-name="Strong_20_Emphasis">4.3 Infrastructure &amp; Engineering</text:span></text:h>
        <text:list text:style-name="L10">
          <text:list-item>
            <text:p text:style-name="P14">Digital infrastructure systems</text:p>
          </text:list-item>
          <text:list-item>
            <text:p text:style-name="P14">Platform integration (GGTC ecosystem sites)</text:p>
          </text:list-item>
          <text:list-item>
            <text:p text:style-name="P14">Scalable deployment models</text:p>
          </text:list-item>
        </text:list>
        <text:h text:style-name="Heading_20_3" text:outline-level="3"><text:span text:style-name="Strong_20_Emphasis">4.4 Applied STEM Education</text:span></text:h>
        <text:list text:style-name="L11">
          <text:list-item>
            <text:p text:style-name="P15">Curriculum-aligned technical content</text:p>
          </text:list-item>
          <text:list-item>
            <text:p text:style-name="P15">Practical system-based learning</text:p>
          </text:list-item>
          <text:list-item>
            <text:p text:style-name="P15">Integration with publishing (GGTCPUBLISHING)</text:p>
          </text:list-item>
        </text:list>
        <text:h text:style-name="Heading_20_3" text:outline-level="3"><text:span text:style-name="Strong_20_Emphasis">4.5 Data &amp; Knowledge Systems</text:span></text:h>
        <text:list text:style-name="L12">
          <text:list-item>
            <text:p text:style-name="P16">Structured data archiving (library-first model)</text:p>
          </text:list-item>
          <text:list-item>
            <text:p text:style-name="P16">Information classification and retrieval systems</text:p>
          </text:list-item>
          <text:list-item>
            <text:p text:style-name="P16">Long-term knowledge preservation</text:p>
          </text:list-item>
        </text:list>
        <text:p text:style-name="Horizontal_20_Line"/>
        <text:h text:style-name="Heading_20_2" text:outline-level="2"><text:span text:style-name="Strong_20_Emphasis">5. GGTC Platform Integration</text:span></text:h>
        <table:table table:name="Table1" table:style-name="Table1">
          <table:table-column table:style-name="Table1.A"/>
          <table:table-column table:style-name="Table1.B"/>
          <table:table-header-rows>
            <table:table-row>
              <table:table-cell table:style-name="Table1.A1" office:value-type="string">
                <text:p text:style-name="Table_20_Heading">Platform</text:p>
              </table:table-cell>
              <table:table-cell table:style-name="Table1.A1" office:value-type="string">
                <text:p text:style-name="Table_20_Heading">Role in Research</text:p>
              </table:table-cell>
            </table:table-row>
          </table:table-header-rows>
          <table:table-row>
            <table:table-cell table:style-name="Table1.A1" office:value-type="string">
              <text:p text:style-name="Table_20_Contents"><text:span text:style-name="Strong_20_Emphasis">GGTC.info</text:span></text:p>
            </table:table-cell>
            <table:table-cell table:style-name="Table1.A1" office:value-type="string">
              <text:p text:style-name="Table_20_Contents">Core corporate and systems hub</text:p>
            </table:table-cell>
          </table:table-row>
          <table:table-row>
            <table:table-cell table:style-name="Table1.A1" office:value-type="string">
              <text:p text:style-name="Table_20_Contents"><text:span text:style-name="Strong_20_Emphasis">Quibhoball.com</text:span></text:p>
            </table:table-cell>
            <table:table-cell table:style-name="Table1.A1" office:value-type="string">
              <text:p text:style-name="Table_20_Contents">Conceptual / system extension layer (defined by user)</text:p>
            </table:table-cell>
          </table:table-row>
          <table:table-row>
            <table:table-cell table:style-name="Table1.A1" office:value-type="string">
              <text:p text:style-name="Table_20_Contents"><text:span text:style-name="Strong_20_Emphasis">GGTCUNIVERSE.com</text:span></text:p>
            </table:table-cell>
            <table:table-cell table:style-name="Table1.A1" office:value-type="string">
              <text:p text:style-name="Table_20_Contents">Expanded ecosystem and narrative-linked systems</text:p>
            </table:table-cell>
          </table:table-row>
        </table:table>
        <text:p text:style-name="Text_20_body">(<text:span text:style-name="Emphasis">No assumptions added beyond naming—structure remains open per your rules.</text:span>)</text:p>
        <text:p text:style-name="Horizontal_20_Line"/>
        <text:h text:style-name="Heading_20_2" text:outline-level="2"><text:span text:style-name="Strong_20_Emphasis">6. Methodology</text:span></text:h>
        <text:list text:style-name="L13">
          <text:list-item>
            <text:p text:style-name="P17">Structured documentation and version control</text:p>
          </text:list-item>
          <text:list-item>
            <text:p text:style-name="P17">Incremental system development (no assumed timelines)</text:p>
          </text:list-item>
          <text:list-item>
            <text:p text:style-name="P17">Controlled expansion of research domains</text:p>
          </text:list-item>
          <text:list-item>
            <text:p text:style-name="P17">Integration of real-world and conceptual system models</text:p>
          </text:list-item>
        </text:list>
        <text:p text:style-name="Horizontal_20_Line"/>
        <text:h text:style-name="Heading_20_2" text:outline-level="2"><text:soft-page-break/><text:span text:style-name="Strong_20_Emphasis">7. Output &amp; Deliverables</text:span></text:h>
        <text:list text:style-name="L14">
          <text:list-item>
            <text:p text:style-name="P18">Research papers (JP Johnson Publishing / GGTCPUBLISHING)</text:p>
          </text:list-item>
          <text:list-item>
            <text:p text:style-name="P18">System architecture models</text:p>
          </text:list-item>
          <text:list-item>
            <text:p text:style-name="P18">Educational modules</text:p>
          </text:list-item>
          <text:list-item>
            <text:p text:style-name="P18">Technical documentation archives</text:p>
          </text:list-item>
        </text:list>
        <text:p text:style-name="Horizontal_20_Line"/>
        <text:h text:style-name="Heading_20_2" text:outline-level="2"><text:span text:style-name="Strong_20_Emphasis">8. Future Expansion (Intentionally Open)</text:span></text:h>
        <text:p text:style-name="Text_20_body">This section remains undefined until explicitly specified.</text:p>
        <text:p text:style-name="Horizontal_20_Line"/>
        <text:h text:style-name="Heading_20_1" text:outline-level="1"><text:span text:style-name="Strong_20_Emphasis">Next Step Options</text:span></text:h>
        <text:p text:style-name="Text_20_body">Choose one direction and I’ll build it out fully:</text:p>
        <text:h text:style-name="Heading_20_3" text:outline-level="3"><text:span text:style-name="Strong_20_Emphasis">Option A — Full Formal Paper</text:span></text:h>
        <text:list text:style-name="L15">
          <text:list-item>
            <text:p text:style-name="P19">10–20 page academic-style research document</text:p>
          </text:list-item>
          <text:list-item>
            <text:p text:style-name="P19">Proper sections (abstract, literature-style framing, citations style if needed)</text:p>
          </text:list-item>
        </text:list>
        <text:h text:style-name="Heading_20_3" text:outline-level="3"><text:span text:style-name="Strong_20_Emphasis">Option B — Branded PDF / Presentation</text:span></text:h>
        <text:list text:style-name="L16">
          <text:list-item>
            <text:p text:style-name="P20">Visual cover</text:p>
          </text:list-item>
          <text:list-item>
            <text:p text:style-name="P20">Clean institutional layout</text:p>
          </text:list-item>
          <text:list-item>
            <text:p text:style-name="P20">Ready for publishing or sharing</text:p>
          </text:list-item>
        </text:list>
        <text:h text:style-name="Heading_20_3" text:outline-level="3"><text:span text:style-name="Strong_20_Emphasis">Option C — Website-Ready Version</text:span></text:h>
        <text:list text:style-name="L17">
          <text:list-item>
            <text:p text:style-name="P21">Structured for GGTC.info</text:p>
          </text:list-item>
          <text:list-item>
            <text:p text:style-name="P21">Sectioned HTML-style content</text:p>
          </text:list-item>
        </text:list>
        <text:h text:style-name="Heading_20_3" text:outline-level="3"><text:span text:style-name="Strong_20_Emphasis">Option D — Hybrid (Recommended)</text:span></text:h>
        <text:list text:style-name="L18">
          <text:list-item>
            <text:p text:style-name="P22">Formal research doc + branded cover + web version</text:p>
          </text:list-item>
        </text:list>
        <text:p text:style-name="Horizontal_20_Line"/>
        <text:p text:style-name="Text_20_body">If you want, I can also:</text:p>
        <text:list text:style-name="L19">
          <text:list-item>
            <text:p text:style-name="P23">Integrate your uploaded visuals into the cover</text:p>
          </text:list-item>
          <text:list-item>
            <text:p text:style-name="P23">Add a <text:span text:style-name="Strong_20_Emphasis">GGTC seal / insignia layout</text:span></text:p>
          </text:list-item>
          <text:list-item>
            <text:p text:style-name="P23">Format this into a <text:span text:style-name="Strong_20_Emphasis">publish-ready DOCX or PDF</text:span></text:p>
          </text:list-item>
        </text:list>
        <text:p text:style-name="Text_20_body">Just specify which direction.</text:p>
        <text:p text:style-name="P9"><text:soft-page-break/></text:p>
        <text:p text:style-name="P9">previously i used to say no to the html but now i can actually use it so yes please </text:p>
        <text:p text:style-name="Text_20_body"/>
        <text:p text:style-name="P7">The HTML page is set up in canvas as a web-ready file.</text:p>
        <text:p text:style-name="Text_20_body">It includes:</text:p>
        <text:list text:style-name="L20">
          <text:list-item>
            <text:p text:style-name="P24">the branded header</text:p>
          </text:list-item>
          <text:list-item>
            <text:p text:style-name="P24">the March 31, 2026 date</text:p>
          </text:list-item>
          <text:list-item>
            <text:p text:style-name="P24">GGTC.info, Quibhoball.com, and GGTCUNIVERSE.com</text:p>
          </text:list-item>
          <text:list-item>
            <text:p text:style-name="P24">a formal STEM research layout with sections for summary, objectives, domains, methodology, platform integration, and outputs</text:p>
          </text:list-item>
        </text:list>
        <text:p text:style-name="Text_20_body">Next I can convert this into a more homepage-style landing page or make it match a stricter institutional/corporate visual style.</text:p>
        <text:p text:style-name="P9"/>
        <text:p text:style-name="P9">Next I can convert this into a more homepage-style landing page or make it match a stricter institutional/corporate visual style.</text:p>
        <text:p text:style-name="P9"/>
        <text:section text:style-name="Sect1" text:name="textdoc-message-69cb8c01953881919d6401ed5daad399">
          <text:p text:style-name="P25">Ggtc Stem Research Page· html</text:p>
          <text:section text:style-name="Sect1" text:name="codemirror">
            <text:p text:style-name="P26">&lt;!DOCTYPE html&gt;</text:p>
            <text:p text:style-name="P27">&lt;html lang="en"&gt;</text:p>
            <text:p text:style-name="P27">&lt;head&gt;</text:p>
            <text:p text:style-name="P27">&lt;meta charset="UTF-8" /&gt;</text:p>
            <text:p text:style-name="P27">&lt;meta name="viewport" content="width=device-width, initial-scale=1.0" /&gt;</text:p>
            <text:p text:style-name="P27">&lt;title&gt;GGTC STEM Research Initiative&lt;/title&gt;</text:p>
            <text:p text:style-name="P27">&lt;style&gt;</text:p>
            <text:p text:style-name="P27">:root {</text:p>
            <text:p text:style-name="P27">--bg: #09111f;</text:p>
            <text:p text:style-name="P27">--bg-2: #0f1a2e;</text:p>
            <text:p text:style-name="P27">--panel: #101a2b;</text:p>
            <text:p text:style-name="P27">--panel-2: #13213a;</text:p>
            <text:p text:style-name="P27">--text: #eef3ff;</text:p>
            <text:p text:style-name="P27">--muted: #b7c3dc;</text:p>
            <text:p text:style-name="P27"><text:soft-page-break/>--line: #263656;</text:p>
            <text:p text:style-name="P27">--accent: #8fb8ff;</text:p>
            <text:p text:style-name="P27">--accent-soft: rgba(143, 184, 255, 0.12);</text:p>
            <text:p text:style-name="P27">--max: 1180px;</text:p>
            <text:p text:style-name="P27">}</text:p>
            <text:p text:style-name="P27"/>
            <text:p text:style-name="P27">* { box-sizing: border-box; }</text:p>
            <text:p text:style-name="P27"/>
            <text:p text:style-name="P27">html { scroll-behavior: smooth; }</text:p>
            <text:p text:style-name="P27"/>
            <text:p text:style-name="P27">body {</text:p>
            <text:p text:style-name="P27">margin: 0;</text:p>
            <text:p text:style-name="P27">font-family: Inter, Arial, Helvetica, sans-serif;</text:p>
            <text:p text:style-name="P27">color: var(--text);</text:p>
            <text:p text:style-name="P27">background:</text:p>
            <text:p text:style-name="P27">radial-gradient(circle at top right, rgba(143, 184, 255, 0.12), transparent 28%),</text:p>
            <text:p text:style-name="P27">linear-gradient(180deg, var(--bg) 0%, var(--bg-2) 100%);</text:p>
            <text:p text:style-name="P27">line-height: 1.6;</text:p>
            <text:p text:style-name="P27">}</text:p>
            <text:p text:style-name="P27"/>
            <text:p text:style-name="P27">a {</text:p>
            <text:p text:style-name="P27">color: inherit;</text:p>
          </text:section>
        </text:section>
        <text:p text:style-name="Text_20_body">Updated.</text:p>
        <text:p text:style-name="Text_20_body">The page now reads as a <text:span text:style-name="Strong_20_Emphasis">homepage-style institutional landing page</text:span> with:</text:p>
        <text:list text:style-name="L21">
          <text:list-item>
            <text:p text:style-name="P28">a stricter corporate header/navigation</text:p>
          </text:list-item>
          <text:list-item>
            <text:p text:style-name="P28">a more formal hero section</text:p>
          </text:list-item>
          <text:list-item>
            <text:p text:style-name="P28">cleaner research-domain blocks</text:p>
          </text:list-item>
          <text:list-item>
            <text:p text:style-name="P28"><text:soft-page-break/>platform alignment cards</text:p>
          </text:list-item>
          <text:list-item>
            <text:p text:style-name="P28">methodology and deliverables sections</text:p>
          </text:list-item>
          <text:list-item>
            <text:p text:style-name="P28">a more controlled institutional visual style overall</text:p>
          </text:list-item>
        </text:list>
        <text:p text:style-name="Text_20_body">The next useful step is to add your actual GGTC imagery or logo treatment into the hero/header so it matches your existing branding more closely.</text:p>
        <text:p text:style-name="P9"/>
        <text:p text:style-name="P9">where do i input this in the application on worpress</text:p>
        <text:p text:style-name="Text_20_body"/>
        <text:p text:style-name="Text_20_body">You have a few clean ways to use this in <text:span text:style-name="Strong_20_Emphasis">WordPress</text:span>, depending on how your site is set up. I’ll give you the most reliable options, starting with the simplest.</text:p>
        <text:p text:style-name="Horizontal_20_Line"/>
        <text:h text:style-name="Heading_20_1" text:outline-level="1"><text:span text:style-name="Strong_20_Emphasis">Option 1 — Use a “Custom HTML” Block (Fastest)</text:span></text:h>
        <text:p text:style-name="Text_20_body">Best if you're using Gutenberg (default WordPress editor).</text:p>
        <text:h text:style-name="Heading_20_3" text:outline-level="3">Steps:</text:h>
        <text:list text:style-name="L22">
          <text:list-item>
            <text:p text:style-name="P29">Go to your WordPress dashboard</text:p>
          </text:list-item>
          <text:list-item>
            <text:p text:style-name="P29">Click <text:span text:style-name="Strong_20_Emphasis">Pages → Add New</text:span> (or edit an existing page)</text:p>
          </text:list-item>
          <text:list-item>
            <text:p text:style-name="P29">In the editor:</text:p>
            <text:list>
              <text:list-item>
                <text:p text:style-name="P29">Click <text:span text:style-name="Strong_20_Emphasis">“+” (Add Block)</text:span></text:p>
              </text:list-item>
              <text:list-item>
                <text:p text:style-name="P29">Search for <text:span text:style-name="Strong_20_Emphasis">“Custom HTML”</text:span></text:p>
              </text:list-item>
            </text:list>
          </text:list-item>
          <text:list-item>
            <text:p text:style-name="P29">Paste the <text:span text:style-name="Strong_20_Emphasis">HTML code inside that block</text:span></text:p>
          </text:list-item>
          <text:list-item>
            <text:p text:style-name="P29">Click <text:span text:style-name="Strong_20_Emphasis">Preview → Preview in new tab</text:span></text:p>
          </text:list-item>
          <text:list-item>
            <text:p text:style-name="P29">If it looks correct → click <text:span text:style-name="Strong_20_Emphasis">Publish</text:span></text:p>
          </text:list-item>
        </text:list>
        <text:h text:style-name="Heading_20_3" text:outline-level="3">Important:</text:h>
        <text:list text:style-name="L23">
          <text:list-item>
            <text:p text:style-name="P30"><text:span text:style-name="Strong_20_Emphasis">Remove this part before pasting:</text:span></text:p>
          </text:list-item>
        </text:list>
        <text:section text:style-name="Sect2" text:name="code-block-viewer">
          <text:p text:style-name="P31"><text:span text:style-name="Source_20_Text">&lt;!DOCTYPE html&gt;</text:span></text:p>
          <text:p text:style-name="Preformatted_20_Text"><text:span text:style-name="Source_20_Text">&lt;html&gt;</text:span></text:p>
          <text:p text:style-name="Preformatted_20_Text"><text:span text:style-name="Source_20_Text">&lt;head&gt; ... &lt;/head&gt;</text:span></text:p>
          <text:p text:style-name="P32"><text:span text:style-name="Source_20_Text">&lt;body&gt;</text:span></text:p>
        </text:section>
        <text:p text:style-name="P7">➡ Only paste <text:span text:style-name="Strong_20_Emphasis">everything inside </text:span><text:span text:style-name="Strong_20_Emphasis"><text:span text:style-name="Source_20_Text">&lt;body&gt; ... &lt;/body&gt;</text:span></text:span></text:p>
        <text:p text:style-name="Horizontal_20_Line"/>
        <text:h text:style-name="Heading_20_1" text:outline-level="1"><text:soft-page-break/><text:span text:style-name="Strong_20_Emphasis">Option 2 — Use a Page Builder (Elementor, etc.)</text:span></text:h>
        <text:p text:style-name="Text_20_body">If you're using Elementor or similar:</text:p>
        <text:h text:style-name="Heading_20_3" text:outline-level="3">Steps (Elementor example):</text:h>
        <text:list text:style-name="L24">
          <text:list-item>
            <text:p text:style-name="P33">Edit page → <text:span text:style-name="Strong_20_Emphasis">Edit with Elementor</text:span></text:p>
          </text:list-item>
          <text:list-item>
            <text:p text:style-name="P33">Drag in an <text:span text:style-name="Strong_20_Emphasis">HTML widget</text:span></text:p>
          </text:list-item>
          <text:list-item>
            <text:p text:style-name="P33">Paste your code</text:p>
          </text:list-item>
          <text:list-item>
            <text:p text:style-name="P33">Update page</text:p>
          </text:list-item>
        </text:list>
        <text:p text:style-name="Horizontal_20_Line"/>
        <text:h text:style-name="Heading_20_1" text:outline-level="1"><text:span text:style-name="Strong_20_Emphasis">Option 3 — Full Page Template (Advanced / Cleanest)</text:span></text:h>
        <text:p text:style-name="Text_20_body">Best if you want this as a <text:span text:style-name="Strong_20_Emphasis">true standalone branded page</text:span></text:p>
        <text:h text:style-name="Heading_20_3" text:outline-level="3">Steps:</text:h>
        <text:list text:style-name="L25">
          <text:list-item>
            <text:p text:style-name="P34">Go to:</text:p>
            <text:list>
              <text:list-item>
                <text:p text:style-name="P34"><text:span text:style-name="Strong_20_Emphasis">Appearance → Theme File Editor</text:span></text:p>
              </text:list-item>
            </text:list>
          </text:list-item>
          <text:list-item>
            <text:p text:style-name="P34">Create a new file like:</text:p>
          </text:list-item>
        </text:list>
        <text:section text:style-name="Sect2" text:name="Section1">
          <text:p text:style-name="P35"><text:bookmark text:name="code-block-viewer"/><text:span text:style-name="Source_20_Text">page-ggtc-stem.php</text:span></text:p>
        </text:section>
        <text:list text:style-name="L26">
          <text:list-item>
            <text:p text:style-name="P36">Paste full HTML but wrap it in WordPress structure:</text:p>
          </text:list-item>
        </text:list>
        <text:section text:style-name="Sect2" text:name="Section2">
          <text:p text:style-name="P31"><text:bookmark text:name="code-block-viewer Copy 1"/><text:span text:style-name="Source_20_Text">&lt;?php get_header(); ?&gt;</text:span></text:p>
          <text:p text:style-name="Preformatted_20_Text"><text:span text:style-name="Source_20_Text">&lt;!-- your HTML body content here --&gt;</text:span></text:p>
          <text:p text:style-name="P32"><text:span text:style-name="Source_20_Text">&lt;?php get_footer(); ?&gt;</text:span></text:p>
        </text:section>
        <text:list text:style-name="L27">
          <text:list-item>
            <text:p text:style-name="P37">Save</text:p>
          </text:list-item>
          <text:list-item>
            <text:p text:style-name="P38">Go to your page → assign this template</text:p>
          </text:list-item>
        </text:list>
        <text:p text:style-name="Horizontal_20_Line"/>
        <text:h text:style-name="Heading_20_1" text:outline-level="1"><text:span text:style-name="Strong_20_Emphasis">Option 4 — Upload as Static Page (Most Controlled)</text:span></text:h>
        <text:p text:style-name="Text_20_body">If you want <text:span text:style-name="Strong_20_Emphasis">exact design control (no theme interference):</text:span></text:p>
        <text:list text:style-name="L28">
          <text:list-item>
            <text:p text:style-name="P39">Save the file as:</text:p>
          </text:list-item>
        </text:list>
        <text:section text:style-name="Sect2" text:name="Section3">
          <text:p text:style-name="P35"><text:bookmark text:name="code-block-viewer Copy 2"/><text:span text:style-name="Source_20_Text">index.html</text:span></text:p>
        </text:section>
        <text:list text:style-name="L29">
          <text:list-item>
            <text:p text:style-name="P40"><text:soft-page-break/>Upload via:</text:p>
            <text:list>
              <text:list-item>
                <text:p text:style-name="P41"><text:span text:style-name="Strong_20_Emphasis">Hosting (cPanel / FTP)</text:span></text:p>
              </text:list-item>
              <text:list-item>
                <text:p text:style-name="P41">or WordPress File Manager plugin</text:p>
              </text:list-item>
            </text:list>
          </text:list-item>
          <text:list-item>
            <text:p text:style-name="P41">Place it in:</text:p>
          </text:list-item>
        </text:list>
        <text:section text:style-name="Sect2" text:name="Section4">
          <text:p text:style-name="P35"><text:bookmark text:name="code-block-viewer Copy 3"/><text:span text:style-name="Source_20_Text">/public_html/ggtc-stem/</text:span></text:p>
        </text:section>
        <text:list text:style-name="L30">
          <text:list-item>
            <text:p text:style-name="P42">Visit:</text:p>
          </text:list-item>
        </text:list>
        <text:section text:style-name="Sect2" text:name="Section5">
          <text:p text:style-name="P35"><text:bookmark text:name="code-block-viewer Copy 4"/><text:span text:style-name="Source_20_Text">yourdomain.com/ggtc-stem/</text:span></text:p>
        </text:section>
        <text:p text:style-name="Horizontal_20_Line"/>
        <text:h text:style-name="Heading_20_1" text:outline-level="1"><text:span text:style-name="Strong_20_Emphasis">Common Issues (Important)</text:span></text:h>
        <text:h text:style-name="Heading_20_3" text:outline-level="3">1. Styles not working?</text:h>
        <text:p text:style-name="Text_20_body">WordPress may strip <text:span text:style-name="Source_20_Text">&lt;style&gt;</text:span> tags.</text:p>
        <text:p text:style-name="Text_20_body">Fix:</text:p>
        <text:list text:style-name="L31">
          <text:list-item>
            <text:p text:style-name="P43">Use <text:span text:style-name="Strong_20_Emphasis">Custom HTML block</text:span>, not Paragraph</text:p>
          </text:list-item>
          <text:list-item>
            <text:p text:style-name="P43">Or move CSS to:<text:line-break/><text:span text:style-name="Strong_20_Emphasis">Appearance → Customize → Additional CSS</text:span></text:p>
          </text:list-item>
        </text:list>
        <text:p text:style-name="Horizontal_20_Line"/>
        <text:h text:style-name="Heading_20_3" text:outline-level="3">2. Page looks “boxed” or off</text:h>
        <text:p text:style-name="Text_20_body">Your theme is overriding layout.</text:p>
        <text:p text:style-name="Text_20_body">Fix:</text:p>
        <text:list text:style-name="L32">
          <text:list-item>
            <text:p text:style-name="P44">Set page template to:</text:p>
            <text:list>
              <text:list-item>
                <text:p text:style-name="P44"><text:span text:style-name="Strong_20_Emphasis">Full Width</text:span></text:p>
              </text:list-item>
              <text:list-item>
                <text:p text:style-name="P44">or <text:span text:style-name="Strong_20_Emphasis">Canvas (Elementor)</text:span></text:p>
              </text:list-item>
            </text:list>
          </text:list-item>
        </text:list>
        <text:p text:style-name="Horizontal_20_Line"/>
        <text:h text:style-name="Heading_20_3" text:outline-level="3">3. Header conflicts</text:h>
        <text:p text:style-name="Text_20_body">If you see double headers:</text:p>
        <text:list text:style-name="L33">
          <text:list-item>
            <text:p text:style-name="P45">Remove your custom header OR</text:p>
          </text:list-item>
          <text:list-item>
            <text:p text:style-name="P45">Use a <text:span text:style-name="Strong_20_Emphasis">Blank / Canvas template</text:span></text:p>
          </text:list-item>
        </text:list>
        <text:p text:style-name="Horizontal_20_Line"/>
        <text:h text:style-name="Heading_20_1" text:outline-level="1"><text:soft-page-break/><text:span text:style-name="Strong_20_Emphasis">Recommended Setup (For You)</text:span></text:h>
        <text:p text:style-name="Text_20_body">Given what you're building with GGTC:</text:p>
        <text:p text:style-name="Text_20_body">→ Use <text:span text:style-name="Strong_20_Emphasis">Option 1 (Custom HTML)</text:span> + <text:span text:style-name="Strong_20_Emphasis">Full Width page</text:span></text:p>
        <text:p text:style-name="Text_20_body">Then later:<text:line-break/>→ Upgrade to <text:span text:style-name="Strong_20_Emphasis">custom template (Option 3)</text:span> when you want full control</text:p>
        <text:p text:style-name="Horizontal_20_Line"/>
        <text:p text:style-name="Text_20_body">If you want next step, I can:</text:p>
        <text:list text:style-name="L34">
          <text:list-item>
            <text:p text:style-name="P46">Convert this into a <text:span text:style-name="Strong_20_Emphasis">WordPress-ready version (no stripping issues)</text:span></text:p>
          </text:list-item>
          <text:list-item>
            <text:p text:style-name="P46">Or adapt it specifically for <text:span text:style-name="Strong_20_Emphasis">Elementor / Astra / Kadence / whatever theme you're using</text:span></text:p>
          </text:list-item>
        </text:list>
        <text:p text:style-name="Text_20_body">Just tell me your theme 👍</text:p>
        <text:p text:style-name="P9"/>
        <text:p text:style-name="P9">Convert this into a WordPress-ready version (no stripping issues)</text:p>
        <text:p text:style-name="P9"/>
        <text:section text:style-name="Sect1" text:name="textdoc-message-69d03787c190819180ebc8da86ce46ef">
          <text:p text:style-name="P25">Ggtc Stem Wordpress Ready· html</text:p>
          <text:section text:style-name="Sect1" text:name="Section6">
            <text:p text:style-name="P26"><text:bookmark text:name="codemirror"/>========================= --&gt;</text:p>
            <text:p text:style-name="P26">margin: 0;</text:p>
            <text:p text:style-name="P27">color: var(--ggtc-muted);</text:p>
            <text:p text:style-name="P27">max-width: 60ch;</text:p>
            <text:p text:style-name="P27">}</text:p>
            <text:p text:style-name="P27"/>
            <text:p text:style-name="P27">@media (max-width: 1100px) {</text:p>
            <text:p text:style-name="P27">#ggtc-stem-page .ggtc-stats-grid,</text:p>
            <text:p text:style-name="P27">#ggtc-stem-page .ggtc-deliverables-grid {</text:p>
            <text:p text:style-name="P27">grid-template-columns: repeat(2, minmax(0, 1fr));</text:p>
            <text:p text:style-name="P27">}</text:p>
            <text:p text:style-name="P27">}</text:p>
            <text:p text:style-name="P27"/>
            <text:p text:style-name="P27">@media (max-width: 900px) {</text:p>
            <text:p text:style-name="P27">#ggtc-stem-page .ggtc-hero-shell,</text:p>
            <text:p text:style-name="P27"><text:soft-page-break/>#ggtc-stem-page .ggtc-card-grid,</text:p>
            <text:p text:style-name="P27">#ggtc-stem-page .ggtc-platform-grid {</text:p>
            <text:p text:style-name="P27">grid-template-columns: 1fr;</text:p>
            <text:p text:style-name="P27">}</text:p>
            <text:p text:style-name="P27"/>
            <text:p text:style-name="P27">#ggtc-stem-page .ggtc-hero-sites {</text:p>
            <text:p text:style-name="P27">grid-template-columns: 1fr;</text:p>
            <text:p text:style-name="P27">}</text:p>
            <text:p text:style-name="P27"/>
            <text:p text:style-name="P27">#ggtc-stem-page .ggtc-topbar-inner,</text:p>
            <text:p text:style-name="P27">#ggtc-stem-page .ggtc-cta-panel,</text:p>
            <text:p text:style-name="P27">#ggtc-stem-page .ggtc-section-heading {</text:p>
            <text:p text:style-name="P27">align-items: flex-start;</text:p>
            <text:p text:style-name="P27">flex-direction: column;</text:p>
            <text:p text:style-name="P27">}</text:p>
            <text:p text:style-name="P27"/>
            <text:p text:style-name="P27">#ggtc-stem-page .ggtc-nav {</text:p>
            <text:p text:style-name="P27">justify-content: flex-start;</text:p>
            <text:p text:style-name="P27">}</text:p>
            <text:p text:style-name="P27">}</text:p>
            <text:p text:style-name="P27"/>
            <text:p text:style-name="P27">@media (max-width: 640px) {</text:p>
            <text:p text:style-name="P27">#ggtc-stem-page .ggtc-stats-grid,</text:p>
            <text:p text:style-name="P27">#ggtc-stem-page .ggtc-deliverables-grid {</text:p>
            <text:p text:style-name="P27">grid-template-columns: 1fr;</text:p>
            <text:p text:style-name="P27">}</text:p>
            <text:p text:style-name="P27"><text:soft-page-break/></text:p>
            <text:p text:style-name="P27">#ggtc-stem-page .ggtc-hero-main,</text:p>
            <text:p text:style-name="P27">#ggtc-stem-page .ggtc-hero-side,</text:p>
            <text:p text:style-name="P27">#ggtc-stem-page .ggtc-section-card,</text:p>
            <text:p text:style-name="P27">#ggtc-stem-page .ggtc-cta-panel {</text:p>
            <text:p text:style-name="P27">padding: 22px;</text:p>
            <text:p text:style-name="P27">}</text:p>
            <text:p text:style-name="P27"/>
            <text:p text:style-name="P27">#ggtc-stem-page h1 {</text:p>
            <text:p text:style-name="P27">max-width: none;</text:p>
            <text:p text:style-name="P27">}</text:p>
            <text:p text:style-name="P27">}</text:p>
            <text:p text:style-name="P27"/>
          </text:section>
        </text:section>
        <text:p text:style-name="Text_20_body">Done.</text:p>
        <text:p text:style-name="Text_20_body">I converted it into a <text:span text:style-name="Strong_20_Emphasis">WordPress-ready split version</text:span> in canvas:</text:p>
        <text:h text:style-name="Heading_20_2" text:outline-level="2">What changed</text:h>
        <text:list text:style-name="L35">
          <text:list-item>
            <text:p text:style-name="P47"><text:span text:style-name="Strong_20_Emphasis">HTML is separate</text:span> for a <text:span text:style-name="Strong_20_Emphasis">Custom HTML block</text:span></text:p>
          </text:list-item>
          <text:list-item>
            <text:p text:style-name="P47"><text:span text:style-name="Strong_20_Emphasis">CSS is separate</text:span> for <text:span text:style-name="Strong_20_Emphasis">Appearance → Customize → Additional CSS</text:span></text:p>
          </text:list-item>
          <text:list-item>
            <text:p text:style-name="P47">No <text:span text:style-name="Source_20_Text">&lt;html&gt;</text:span>, <text:span text:style-name="Source_20_Text">&lt;head&gt;</text:span>, <text:span text:style-name="Source_20_Text">&lt;body&gt;</text:span>, or <text:span text:style-name="Source_20_Text">&lt;style&gt;</text:span> wrappers inside the page content</text:p>
          </text:list-item>
          <text:list-item>
            <text:p text:style-name="P47">All styling is scoped under <text:span text:style-name="Source_20_Text">#ggtc-stem-page</text:span> to reduce theme conflicts</text:p>
          </text:list-item>
        </text:list>
        <text:h text:style-name="Heading_20_2" text:outline-level="2">Where to paste each part</text:h>
        <text:h text:style-name="Heading_20_3" text:outline-level="3">In WordPress page editor</text:h>
        <text:list text:style-name="L36">
          <text:list-item>
            <text:p text:style-name="P48">Add a <text:span text:style-name="Strong_20_Emphasis">Custom HTML</text:span> block</text:p>
          </text:list-item>
          <text:list-item>
            <text:p text:style-name="P48">Paste only the <text:span text:style-name="Strong_20_Emphasis">HTML FOR WORDPRESS PAGE BLOCK</text:span> section</text:p>
          </text:list-item>
        </text:list>
        <text:h text:style-name="Heading_20_3" text:outline-level="3">In WordPress customizer</text:h>
        <text:list text:style-name="L37">
          <text:list-item>
            <text:p text:style-name="P49">Go to <text:span text:style-name="Strong_20_Emphasis">Appearance → Customize → Additional CSS</text:span></text:p>
          </text:list-item>
          <text:list-item>
            <text:p text:style-name="P49">Paste only the <text:span text:style-name="Strong_20_Emphasis">CSS FOR WORDPRESS ADDITIONAL CSS</text:span> section</text:p>
          </text:list-item>
        </text:list>
        <text:h text:style-name="Heading_20_2" text:outline-level="2"><text:soft-page-break/>Best page settings</text:h>
        <text:p text:style-name="Text_20_body">Use one of these if your theme supports it:</text:p>
        <text:list text:style-name="L38">
          <text:list-item>
            <text:p text:style-name="P50"><text:span text:style-name="Strong_20_Emphasis">Full Width</text:span></text:p>
          </text:list-item>
          <text:list-item>
            <text:p text:style-name="P50"><text:span text:style-name="Strong_20_Emphasis">Canvas</text:span></text:p>
          </text:list-item>
          <text:list-item>
            <text:p text:style-name="P50"><text:span text:style-name="Strong_20_Emphasis">No Sidebar</text:span></text:p>
          </text:list-item>
        </text:list>
        <text:p text:style-name="Text_20_body">That avoids boxed layouts and double styling from the theme.</text:p>
        <text:h text:style-name="Heading_20_2" text:outline-level="2">Important</text:h>
        <text:p text:style-name="Text_20_body">Do <text:span text:style-name="Strong_20_Emphasis">not</text:span> paste the CSS into the HTML block.<text:line-break/>Do <text:span text:style-name="Strong_20_Emphasis">not</text:span> paste the HTML into Additional CSS.</text:p>
        <text:p text:style-name="Text_20_body">The next practical step is to make you a version specifically tuned for your WordPress theme so spacing and width match exactly.</text:p>
        <text:p text:style-name="P9"/>
        <text:p text:style-name="P9">GGTC.info Date April 28th GGTC.info time 07:00 ## GGTC Network GGTC.info Quibhoball.com GGTCMULTIMULTIVERSE.com GGTCAI.com GGTCTRAINING.com GGTCPUBLISHING.com GGTCGLOBALMEDIA.com GGTCUNIVERSE.com GGTCQuantumkids.org GGTCSTEMTRAINING.com GGTCGLOBALAI.com --- ## Contact Email :operations@ggtc.info Quibhoball@tiktok GGTC_operations@twitter Facebook Meta Being worked on By Ethan Brooks · Technical SEO Analyst, GGTC Systems Ethan Brooks is a technical SEO analyst specializing in crawlability, indexing, and site performance optimization. He works on identifying why content becomes “invisible” in search engines and how to restore full visibility through proper structure and linking. this is the author so log book entry to update lane then a name for the github repo compact description and readme file </text:p>
        <text:p text:style-name="Text_20_body"/>
        <text:p text:style-name="Text_20_body">Below is a <text:span text:style-name="Strong_20_Emphasis">structured GGTC logbook entry + GitHub repo package</text:span> aligned to your system standards and without adding undefined details.</text:p>
        <text:p text:style-name="Horizontal_20_Line"/>
        <text:h text:style-name="Heading_20_1" text:outline-level="1"><text:span text:style-name="Strong_20_Emphasis">GGTC LOGBOOK ENTRY</text:span></text:h>
        <text:h text:style-name="Heading_20_2" text:outline-level="2"><text:span text:style-name="Strong_20_Emphasis">Date / Time</text:span></text:h>
        <text:list text:style-name="L39">
          <text:list-item>
            <text:p text:style-name="P51"><text:span text:style-name="Strong_20_Emphasis">Date:</text:span> April 28, 2026</text:p>
          </text:list-item>
          <text:list-item>
            <text:p text:style-name="P51"><text:span text:style-name="Strong_20_Emphasis">Time:</text:span> 07:00 (GGTC.info Time – authoritative)</text:p>
          </text:list-item>
        </text:list>
        <text:h text:style-name="Heading_20_2" text:outline-level="2"><text:span text:style-name="Strong_20_Emphasis">System / Lane</text:span></text:h>
        <text:list text:style-name="L40">
          <text:list-item>
            <text:p text:style-name="P52"><text:span text:style-name="Strong_20_Emphasis">System:</text:span> GGTC.info</text:p>
          </text:list-item>
          <text:list-item>
            <text:p text:style-name="P52"><text:soft-page-break/><text:span text:style-name="Strong_20_Emphasis">Lane:</text:span> GGTC.info_STEM_RESEARCH_WEB_INTEGRATION_V000 <text:span text:style-name="Emphasis">(new lane designation for this action)</text:span></text:p>
          </text:list-item>
        </text:list>
        <text:h text:style-name="Heading_20_2" text:outline-level="2"><text:span text:style-name="Strong_20_Emphasis">Status</text:span></text:h>
        <text:list text:style-name="L41">
          <text:list-item>
            <text:p text:style-name="P53">ACTIVE — STRUCTURE UPDATE / WEB + REPO PREPARATION</text:p>
          </text:list-item>
        </text:list>
        <text:h text:style-name="Heading_20_2" text:outline-level="2"><text:span text:style-name="Strong_20_Emphasis">Reference Set</text:span></text:h>
        <text:list text:style-name="L42">
          <text:list-item>
            <text:p text:style-name="P54">operations@ggtc.info</text:p>
          </text:list-item>
          <text:list-item>
            <text:p text:style-name="P54">Quibhoball@TikTok</text:p>
          </text:list-item>
          <text:list-item>
            <text:p text:style-name="P54">GGTC_operations@twitter</text:p>
          </text:list-item>
          <text:list-item>
            <text:p text:style-name="P54">Facebook (Meta) — in progress</text:p>
          </text:list-item>
        </text:list>
        <text:h text:style-name="Heading_20_2" text:outline-level="2"><text:span text:style-name="Strong_20_Emphasis">GGTC Network</text:span></text:h>
        <text:list text:style-name="L43">
          <text:list-item>
            <text:p text:style-name="P55">GGTC.info</text:p>
          </text:list-item>
          <text:list-item>
            <text:p text:style-name="P55">Quibhoball.com</text:p>
          </text:list-item>
          <text:list-item>
            <text:p text:style-name="P55">GGTCMULTIMULTIVERSE.com</text:p>
          </text:list-item>
          <text:list-item>
            <text:p text:style-name="P55">GGTCAI.com</text:p>
          </text:list-item>
          <text:list-item>
            <text:p text:style-name="P55">GGTCTRAINING.com</text:p>
          </text:list-item>
          <text:list-item>
            <text:p text:style-name="P55">GGTCPUBLISHING.com</text:p>
          </text:list-item>
          <text:list-item>
            <text:p text:style-name="P55">GGTCGLOBALMEDIA.com</text:p>
          </text:list-item>
          <text:list-item>
            <text:p text:style-name="P55">GGTCUNIVERSE.com</text:p>
          </text:list-item>
          <text:list-item>
            <text:p text:style-name="P55">GGTCQuantumkids.org</text:p>
          </text:list-item>
          <text:list-item>
            <text:p text:style-name="P55">GGTCSTEMTRAINING.com</text:p>
          </text:list-item>
          <text:list-item>
            <text:p text:style-name="P55">GGTCGLOBALAI.com</text:p>
          </text:list-item>
        </text:list>
        <text:h text:style-name="Heading_20_2" text:outline-level="2"><text:span text:style-name="Strong_20_Emphasis">Operational Context</text:span></text:h>
        <text:p text:style-name="Text_20_body">Creation of a WordPress-ready STEM research page aligned with GGTC systems architecture.<text:line-break/>Transition from document-based structure to <text:span text:style-name="Strong_20_Emphasis">web deployment + repository preparation</text:span>.</text:p>
        <text:h text:style-name="Heading_20_2" text:outline-level="2"><text:span text:style-name="Strong_20_Emphasis">Integrity Status</text:span></text:h>
        <text:list text:style-name="L44">
          <text:list-item>
            <text:p text:style-name="P56">STRUCTURE VERIFIED</text:p>
          </text:list-item>
          <text:list-item>
            <text:p text:style-name="P56">NO EXTERNAL DEPENDENCIES INTRODUCED</text:p>
          </text:list-item>
          <text:list-item>
            <text:p text:style-name="P56">NETWORK CONSISTENCY MAINTAINED</text:p>
          </text:list-item>
        </text:list>
        <text:h text:style-name="Heading_20_2" text:outline-level="2"><text:soft-page-break/><text:span text:style-name="Strong_20_Emphasis">Notes</text:span></text:h>
        <text:list text:style-name="L45">
          <text:list-item>
            <text:p text:style-name="P57">Author defined: <text:span text:style-name="Strong_20_Emphasis">Ethan Brooks · Technical SEO Analyst, GGTC Systems</text:span></text:p>
          </text:list-item>
          <text:list-item>
            <text:p text:style-name="P57">Focus: crawlability, indexing, visibility recovery, and structural SEO integrity</text:p>
          </text:list-item>
          <text:list-item>
            <text:p text:style-name="P57">HTML successfully converted to WordPress-compatible format</text:p>
          </text:list-item>
          <text:list-item>
            <text:p text:style-name="P57">Preparing repository for version control and deployment tracking</text:p>
          </text:list-item>
        </text:list>
        <text:h text:style-name="Heading_20_2" text:outline-level="2"><text:span text:style-name="Strong_20_Emphasis">Next Action</text:span></text:h>
        <text:list text:style-name="L46">
          <text:list-item>
            <text:p text:style-name="P58">Create GitHub repository</text:p>
          </text:list-item>
          <text:list-item>
            <text:p text:style-name="P58">Upload HTML + CSS assets</text:p>
          </text:list-item>
          <text:list-item>
            <text:p text:style-name="P58">Add README and structure documentation</text:p>
          </text:list-item>
          <text:list-item>
            <text:p text:style-name="P58">Link repo into GGTC ecosystem workflow</text:p>
          </text:list-item>
        </text:list>
        <text:p text:style-name="Horizontal_20_Line"/>
        <text:h text:style-name="Heading_20_1" text:outline-level="1"><text:span text:style-name="Strong_20_Emphasis">GITHUB REPOSITORY NAME</text:span></text:h>
        <text:section text:style-name="Sect2" text:name="Section7">
          <text:p text:style-name="P35"><text:bookmark text:name="code-block-viewer Copy 5"/><text:span text:style-name="Source_20_Text">GGTC_INFO_STEM_RESEARCH_WEB_PAGE_V000</text:span></text:p>
        </text:section>
        <text:p text:style-name="Horizontal_20_Line"/>
        <text:h text:style-name="Heading_20_1" text:outline-level="1"><text:span text:style-name="Strong_20_Emphasis">COMPACT DESCRIPTION</text:span></text:h>
        <text:section text:style-name="Sect2" text:name="Section8">
          <text:p text:style-name="P35"><text:bookmark text:name="code-block-viewer Copy 6"/><text:span text:style-name="Source_20_Text">GGTC STEM Research web page (WordPress-ready) including structured HTML, scoped CSS, and system-aligned architecture for GGTC.info ecosystem deployment and SEO integration.</text:span></text:p>
        </text:section>
        <text:p text:style-name="Horizontal_20_Line"/>
        <text:h text:style-name="Heading_20_1" text:outline-level="1"><text:span text:style-name="Strong_20_Emphasis">README.md</text:span></text:h>
        <text:section text:style-name="Sect2" text:name="Section9">
          <text:p text:style-name="P31"><text:bookmark text:name="code-block-viewer Copy 7"/><text:span text:style-name="Source_20_Text"># GGTC_INFO_STEM_RESEARCH_WEB_PAGE_V000</text:span></text:p>
          <text:p text:style-name="Preformatted_20_Text"><text:span text:style-name="Source_20_Text">## Overview</text:span></text:p>
          <text:p text:style-name="Preformatted_20_Text"><text:span text:style-name="Source_20_Text">This repository contains the GGTC STEM Research web page prepared for deployment within the GGTC ecosystem.</text:span></text:p>
          <text:p text:style-name="Preformatted_20_Text"><text:span text:style-name="Source_20_Text">The page is structured for:</text:span></text:p>
          <text:p text:style-name="Preformatted_20_Text"><text:span text:style-name="Source_20_Text">- WordPress compatibility</text:span></text:p>
          <text:p text:style-name="Preformatted_20_Text"><text:span text:style-name="Source_20_Text">- SEO visibility and crawlability</text:span></text:p>
          <text:p text:style-name="Preformatted_20_Text"><text:span text:style-name="Source_20_Text">- Clean system architecture alignment</text:span></text:p>
          <text:p text:style-name="Preformatted_20_Text"><text:span text:style-name="Source_20_Text">## System Context</text:span></text:p>
          <text:p text:style-name="Preformatted_20_Text"><text:span text:style-name="Source_20_Text">Platform: GGTC.info <text:s/></text:span></text:p>
          <text:p text:style-name="Preformatted_20_Text"><text:span text:style-name="Source_20_Text">Date: April 28, 2026 <text:s/></text:span></text:p>
          <text:p text:style-name="Preformatted_20_Text"><text:span text:style-name="Source_20_Text">Time: 07:00 (GGTC.info Time)</text:span></text:p>
          <text:p text:style-name="Preformatted_20_Text"><text:span text:style-name="Source_20_Text">## GGTC Network</text:span></text:p>
          <text:p text:style-name="Preformatted_20_Text"><text:span text:style-name="Source_20_Text">- GGTC.info</text:span></text:p>
          <text:p text:style-name="Preformatted_20_Text"><text:span text:style-name="Source_20_Text">- Quibhoball.com</text:span></text:p>
          <text:p text:style-name="Preformatted_20_Text"><text:span text:style-name="Source_20_Text">- GGTCMULTIMULTIVERSE.com</text:span></text:p>
          <text:p text:style-name="Preformatted_20_Text"><text:span text:style-name="Source_20_Text">- GGTCAI.com</text:span></text:p>
          <text:p text:style-name="Preformatted_20_Text"><text:span text:style-name="Source_20_Text">- GGTCTRAINING.com</text:span></text:p>
          <text:p text:style-name="Preformatted_20_Text"><text:soft-page-break/><text:span text:style-name="Source_20_Text">- GGTCPUBLISHING.com</text:span></text:p>
          <text:p text:style-name="Preformatted_20_Text"><text:span text:style-name="Source_20_Text">- GGTCGLOBALMEDIA.com</text:span></text:p>
          <text:p text:style-name="Preformatted_20_Text"><text:span text:style-name="Source_20_Text">- GGTCUNIVERSE.com</text:span></text:p>
          <text:p text:style-name="Preformatted_20_Text"><text:span text:style-name="Source_20_Text">- GGTCQuantumkids.org</text:span></text:p>
          <text:p text:style-name="Preformatted_20_Text"><text:span text:style-name="Source_20_Text">- GGTCSTEMTRAINING.com</text:span></text:p>
          <text:p text:style-name="Preformatted_20_Text"><text:span text:style-name="Source_20_Text">- GGTCGLOBALAI.com</text:span></text:p>
          <text:p text:style-name="Preformatted_20_Text"><text:span text:style-name="Source_20_Text">## Structure</text:span></text:p>
          <text:p text:style-name="Preformatted_20_Text"><text:span text:style-name="Source_20_Text">This repository includes:</text:span></text:p>
          <text:p text:style-name="Preformatted_20_Text"><text:span text:style-name="Source_20_Text">- WordPress-ready HTML (Custom HTML block compatible)</text:span></text:p>
          <text:p text:style-name="Preformatted_20_Text"><text:span text:style-name="Source_20_Text">- Scoped CSS for theme-safe styling</text:span></text:p>
          <text:p text:style-name="Preformatted_20_Text"><text:span text:style-name="Source_20_Text">- Institutional research layout</text:span></text:p>
          <text:p text:style-name="Preformatted_20_Text"><text:span text:style-name="Source_20_Text">## Author</text:span></text:p>
          <text:p text:style-name="Preformatted_20_Text"><text:span text:style-name="Source_20_Text">Ethan Brooks <text:s/></text:span></text:p>
          <text:p text:style-name="Preformatted_20_Text"><text:span text:style-name="Source_20_Text">Technical SEO Analyst, GGTC Systems <text:s/></text:span></text:p>
          <text:p text:style-name="Preformatted_20_Text"><text:span text:style-name="Source_20_Text">Ethan Brooks specializes in:</text:span></text:p>
          <text:p text:style-name="Preformatted_20_Text"><text:span text:style-name="Source_20_Text">- Crawlability optimization</text:span></text:p>
          <text:p text:style-name="Preformatted_20_Text"><text:span text:style-name="Source_20_Text">- Search engine indexing</text:span></text:p>
          <text:p text:style-name="Preformatted_20_Text"><text:span text:style-name="Source_20_Text">- Technical SEO structure</text:span></text:p>
          <text:p text:style-name="Preformatted_20_Text"><text:span text:style-name="Source_20_Text">- Visibility restoration through proper linking and architecture</text:span></text:p>
          <text:p text:style-name="Preformatted_20_Text"><text:span text:style-name="Source_20_Text">## Contact</text:span></text:p>
          <text:p text:style-name="Preformatted_20_Text"><text:span text:style-name="Source_20_Text">- operations@ggtc.info</text:span></text:p>
          <text:p text:style-name="Preformatted_20_Text"><text:span text:style-name="Source_20_Text">- Quibhoball@TikTok</text:span></text:p>
          <text:p text:style-name="Preformatted_20_Text"><text:span text:style-name="Source_20_Text">- GGTC_operations@twitter</text:span></text:p>
          <text:p text:style-name="Preformatted_20_Text"><text:span text:style-name="Source_20_Text">- Facebook (Meta) — in progress</text:span></text:p>
          <text:p text:style-name="Preformatted_20_Text"><text:span text:style-name="Source_20_Text">## Purpose</text:span></text:p>
          <text:p text:style-name="Preformatted_20_Text"><text:span text:style-name="Source_20_Text">To provide a structured STEM research page that integrates:</text:span></text:p>
          <text:p text:style-name="Preformatted_20_Text"><text:span text:style-name="Source_20_Text">- Systems architecture</text:span></text:p>
          <text:p text:style-name="Preformatted_20_Text"><text:span text:style-name="Source_20_Text">- Cybersecurity framing</text:span></text:p>
          <text:p text:style-name="Preformatted_20_Text"><text:span text:style-name="Source_20_Text">- Infrastructure design concepts</text:span></text:p>
          <text:p text:style-name="Preformatted_20_Text"><text:span text:style-name="Source_20_Text">- Educational alignment</text:span></text:p>
          <text:p text:style-name="Preformatted_20_Text"><text:span text:style-name="Source_20_Text">## Workflow Role</text:span></text:p>
          <text:p text:style-name="Preformatted_20_Text"><text:span text:style-name="Source_20_Text">This repository functions as:</text:span></text:p>
          <text:p text:style-name="Preformatted_20_Text"><text:span text:style-name="Source_20_Text">- Version-controlled web asset</text:span></text:p>
          <text:p text:style-name="Preformatted_20_Text"><text:span text:style-name="Source_20_Text">- Deployment-ready structure for WordPress</text:span></text:p>
          <text:p text:style-name="Preformatted_20_Text"><text:span text:style-name="Source_20_Text">- Part of GGTC publishing and ecosystem pipeline</text:span></text:p>
          <text:p text:style-name="Preformatted_20_Text"><text:span text:style-name="Source_20_Text">## Status</text:span></text:p>
          <text:p text:style-name="Preformatted_20_Text"><text:span text:style-name="Source_20_Text">ACTIVE — INITIAL VERSION (V000)</text:span></text:p>
          <text:p text:style-name="Preformatted_20_Text"><text:span text:style-name="Source_20_Text">## Notes</text:span></text:p>
          <text:p text:style-name="Preformatted_20_Text"><text:span text:style-name="Source_20_Text">No assumptions beyond defined system structure have been introduced.</text:span></text:p>
          <text:p text:style-name="P32"><text:span text:style-name="Source_20_Text">Future expansion requires explicit definition within GGTC framework.</text:span></text:p>
        </text:section>
        <text:p text:style-name="Horizontal_20_Line"/>
        <text:p text:style-name="Text_20_body">If you want next step, I can:</text:p>
        <text:list text:style-name="L47">
          <text:list-item>
            <text:p text:style-name="P59">generate the <text:span text:style-name="Strong_20_Emphasis">actual repo folder structure (files layout)</text:span></text:p>
          </text:list-item>
          <text:list-item>
            <text:p text:style-name="P59">or prepare a <text:span text:style-name="Strong_20_Emphasis">Git commit script / upload sequence</text:span></text:p>
          </text:list-item>
          <text:list-item>
            <text:p text:style-name="P59">or connect this directly to your <text:span text:style-name="Strong_20_Emphasis">WordPress deployment workflow</text:span></text:p>
          </text:list-item>
        </text:list>
        <text:p text:style-name="P9"/>
        <text:p text:style-name="P9">actual repo folder structure (files layout)</text:p>
        <text:p text:style-name="Text_20_body"/>
        <text:h text:style-name="Heading_20_1" text:outline-level="1">Repo Folder Structure</text:h>
        <text:section text:style-name="Sect2" text:name="Section10">
          <text:p text:style-name="P31"><text:bookmark text:name="code-block-viewer Copy 8"/><text:span text:style-name="Source_20_Text">GGTC_INFO_STEM_RESEARCH_WEB_PAGE_V000/</text:span></text:p>
          <text:p text:style-name="Preformatted_20_Text"><text:span text:style-name="Source_20_Text">│</text:span></text:p>
          <text:p text:style-name="Preformatted_20_Text"><text:span text:style-name="Source_20_Text">├── README.md</text:span></text:p>
          <text:p text:style-name="Preformatted_20_Text"><text:span text:style-name="Source_20_Text">├── LICENSE_NOTICE.md</text:span></text:p>
          <text:p text:style-name="Preformatted_20_Text"><text:soft-page-break/><text:span text:style-name="Source_20_Text">├── CHANGELOG.md</text:span></text:p>
          <text:p text:style-name="Preformatted_20_Text"><text:span text:style-name="Source_20_Text">├── repo_manifest.md</text:span></text:p>
          <text:p text:style-name="Preformatted_20_Text"><text:span text:style-name="Source_20_Text">│</text:span></text:p>
          <text:p text:style-name="Preformatted_20_Text"><text:span text:style-name="Source_20_Text">├── wordpress/</text:span></text:p>
          <text:p text:style-name="Preformatted_20_Text"><text:span text:style-name="Source_20_Text">│ <text:s text:c="2"/>├── custom-html-block.html</text:span></text:p>
          <text:p text:style-name="Preformatted_20_Text"><text:span text:style-name="Source_20_Text">│ <text:s text:c="2"/>├── additional-css.css</text:span></text:p>
          <text:p text:style-name="Preformatted_20_Text"><text:span text:style-name="Source_20_Text">│ <text:s text:c="2"/>└── wordpress-install-notes.md</text:span></text:p>
          <text:p text:style-name="Preformatted_20_Text"><text:span text:style-name="Source_20_Text">│</text:span></text:p>
          <text:p text:style-name="Preformatted_20_Text"><text:span text:style-name="Source_20_Text">├── src/</text:span></text:p>
          <text:p text:style-name="Preformatted_20_Text"><text:span text:style-name="Source_20_Text">│ <text:s text:c="2"/>├── index.html</text:span></text:p>
          <text:p text:style-name="Preformatted_20_Text"><text:span text:style-name="Source_20_Text">│ <text:s text:c="2"/>└── styles.css</text:span></text:p>
          <text:p text:style-name="Preformatted_20_Text"><text:span text:style-name="Source_20_Text">│</text:span></text:p>
          <text:p text:style-name="Preformatted_20_Text"><text:span text:style-name="Source_20_Text">├── docs/</text:span></text:p>
          <text:p text:style-name="Preformatted_20_Text"><text:span text:style-name="Source_20_Text">│ <text:s text:c="2"/>├── logbook-entry-2026-04-28-0700.md</text:span></text:p>
          <text:p text:style-name="Preformatted_20_Text"><text:span text:style-name="Source_20_Text">│ <text:s text:c="2"/>├── author-profile-ethan-brooks.md</text:span></text:p>
          <text:p text:style-name="Preformatted_20_Text"><text:span text:style-name="Source_20_Text">│ <text:s text:c="2"/>├── ggtc-network.md</text:span></text:p>
          <text:p text:style-name="Preformatted_20_Text"><text:span text:style-name="Source_20_Text">│ <text:s text:c="2"/>└── deployment-notes.md</text:span></text:p>
          <text:p text:style-name="Preformatted_20_Text"><text:span text:style-name="Source_20_Text">│</text:span></text:p>
          <text:p text:style-name="Preformatted_20_Text"><text:span text:style-name="Source_20_Text">├── assets/</text:span></text:p>
          <text:p text:style-name="Preformatted_20_Text"><text:span text:style-name="Source_20_Text">│ <text:s text:c="2"/>├── images/</text:span></text:p>
          <text:p text:style-name="Preformatted_20_Text"><text:span text:style-name="Source_20_Text">│ <text:s text:c="2"/>│ <text:s text:c="2"/>└── README.md</text:span></text:p>
          <text:p text:style-name="Preformatted_20_Text"><text:span text:style-name="Source_20_Text">│ <text:s text:c="2"/>│</text:span></text:p>
          <text:p text:style-name="Preformatted_20_Text"><text:span text:style-name="Source_20_Text">│ <text:s text:c="2"/>├── logos/</text:span></text:p>
          <text:p text:style-name="Preformatted_20_Text"><text:span text:style-name="Source_20_Text">│ <text:s text:c="2"/>│ <text:s text:c="2"/>└── README.md</text:span></text:p>
          <text:p text:style-name="Preformatted_20_Text"><text:span text:style-name="Source_20_Text">│ <text:s text:c="2"/>│</text:span></text:p>
          <text:p text:style-name="Preformatted_20_Text"><text:span text:style-name="Source_20_Text">│ <text:s text:c="2"/>└── screenshots/</text:span></text:p>
          <text:p text:style-name="Preformatted_20_Text"><text:span text:style-name="Source_20_Text">│ <text:s text:c="6"/>└── README.md</text:span></text:p>
          <text:p text:style-name="Preformatted_20_Text"><text:span text:style-name="Source_20_Text">│</text:span></text:p>
          <text:p text:style-name="Preformatted_20_Text"><text:span text:style-name="Source_20_Text">└── archive/</text:span></text:p>
          <text:p text:style-name="Preformatted_20_Text"><text:span text:style-name="Source_20_Text"><text:s text:c="4"/>└── v000/</text:span></text:p>
          <text:p text:style-name="Preformatted_20_Text"><text:span text:style-name="Source_20_Text"><text:s text:c="8"/>├── original-working-draft.md</text:span></text:p>
          <text:p text:style-name="P32"><text:span text:style-name="Source_20_Text"><text:s text:c="8"/>└── wordpress-ready-copy.md</text:span></text:p>
        </text:section>
        <text:h text:style-name="P60" text:outline-level="1">File Purpose</text:h>
        <table:table table:name="Table2" table:style-name="Table2">
          <table:table-column table:style-name="Table2.A"/>
          <table:table-column table:style-name="Table2.B"/>
          <table:table-header-rows>
            <table:table-row>
              <table:table-cell table:style-name="Table2.A1" office:value-type="string">
                <text:p text:style-name="Table_20_Heading">File / Folder</text:p>
              </table:table-cell>
              <table:table-cell table:style-name="Table2.A1" office:value-type="string">
                <text:p text:style-name="Table_20_Heading">Purpose</text:p>
              </table:table-cell>
            </table:table-row>
          </table:table-header-rows>
          <table:table-row>
            <table:table-cell table:style-name="Table2.A1" office:value-type="string">
              <text:p text:style-name="Table_20_Contents"><text:span text:style-name="Source_20_Text">README.md</text:span></text:p>
            </table:table-cell>
            <table:table-cell table:style-name="Table2.A1" office:value-type="string">
              <text:p text:style-name="Table_20_Contents">Main repository overview</text:p>
            </table:table-cell>
          </table:table-row>
          <table:table-row>
            <table:table-cell table:style-name="Table2.A1" office:value-type="string">
              <text:p text:style-name="Table_20_Contents"><text:span text:style-name="Source_20_Text">LICENSE_NOTICE.md</text:span></text:p>
            </table:table-cell>
            <table:table-cell table:style-name="Table2.A1" office:value-type="string">
              <text:p text:style-name="Table_20_Contents">All Rights Reserved / copyright notice</text:p>
            </table:table-cell>
          </table:table-row>
          <table:table-row>
            <table:table-cell table:style-name="Table2.A1" office:value-type="string">
              <text:p text:style-name="Table_20_Contents"><text:span text:style-name="Source_20_Text">CHANGELOG.md</text:span></text:p>
            </table:table-cell>
            <table:table-cell table:style-name="Table2.A1" office:value-type="string">
              <text:p text:style-name="Table_20_Contents">Version history</text:p>
            </table:table-cell>
          </table:table-row>
          <table:table-row>
            <table:table-cell table:style-name="Table2.A1" office:value-type="string">
              <text:p text:style-name="Table_20_Contents"><text:span text:style-name="Source_20_Text">repo_manifest.md</text:span></text:p>
            </table:table-cell>
            <table:table-cell table:style-name="Table2.A1" office:value-type="string">
              <text:p text:style-name="Table_20_Contents">File index and repo purpose</text:p>
            </table:table-cell>
          </table:table-row>
          <table:table-row>
            <table:table-cell table:style-name="Table2.A1" office:value-type="string">
              <text:p text:style-name="Table_20_Contents"><text:span text:style-name="Source_20_Text">wordpress/</text:span></text:p>
            </table:table-cell>
            <table:table-cell table:style-name="Table2.A1" office:value-type="string">
              <text:p text:style-name="Table_20_Contents">WordPress-ready deployment files</text:p>
            </table:table-cell>
          </table:table-row>
          <table:table-row>
            <table:table-cell table:style-name="Table2.A1" office:value-type="string">
              <text:p text:style-name="Table_20_Contents"><text:span text:style-name="Source_20_Text">src/</text:span></text:p>
            </table:table-cell>
            <table:table-cell table:style-name="Table2.A1" office:value-type="string">
              <text:p text:style-name="Table_20_Contents">Standalone HTML/CSS source version</text:p>
            </table:table-cell>
          </table:table-row>
          <table:table-row>
            <table:table-cell table:style-name="Table2.A1" office:value-type="string">
              <text:p text:style-name="Table_20_Contents"><text:span text:style-name="Source_20_Text">docs/</text:span></text:p>
            </table:table-cell>
            <table:table-cell table:style-name="Table2.A1" office:value-type="string">
              <text:p text:style-name="Table_20_Contents">Supporting documentation and logbook material</text:p>
            </table:table-cell>
          </table:table-row>
          <table:table-row>
            <table:table-cell table:style-name="Table2.A1" office:value-type="string">
              <text:p text:style-name="Table_20_Contents"><text:span text:style-name="Source_20_Text">assets/</text:span></text:p>
            </table:table-cell>
            <table:table-cell table:style-name="Table2.A1" office:value-type="string">
              <text:p text:style-name="Table_20_Contents">Images, logos, screenshots, visual files</text:p>
            </table:table-cell>
          </table:table-row>
          <table:table-row>
            <table:table-cell table:style-name="Table2.A1" office:value-type="string">
              <text:p text:style-name="Table_20_Contents"><text:span text:style-name="Source_20_Text">archive/v000/</text:span></text:p>
            </table:table-cell>
            <table:table-cell table:style-name="Table2.A1" office:value-type="string">
              <text:p text:style-name="Table_20_Contents">Preserved first-version material</text:p>
            </table:table-cell>
          </table:table-row>
        </table:table>
        <text:h text:style-name="Heading_20_1" text:outline-level="1">Recommended First Upload</text:h>
        <text:p text:style-name="Text_20_body">Start with these files first:</text:p>
        <text:section text:style-name="Sect2" text:name="Section11">
          <text:p text:style-name="P31"><text:bookmark text:name="code-block-viewer Copy 9"/><text:span text:style-name="Source_20_Text">README.md</text:span></text:p>
          <text:p text:style-name="Preformatted_20_Text"><text:span text:style-name="Source_20_Text">LICENSE_NOTICE.md</text:span></text:p>
          <text:p text:style-name="Preformatted_20_Text"><text:span text:style-name="Source_20_Text">CHANGELOG.md</text:span></text:p>
          <text:p text:style-name="Preformatted_20_Text"><text:span text:style-name="Source_20_Text">wordpress/custom-html-block.html</text:span></text:p>
          <text:p text:style-name="Preformatted_20_Text"><text:span text:style-name="Source_20_Text">wordpress/additional-css.css</text:span></text:p>
          <text:p text:style-name="P32"><text:span text:style-name="Source_20_Text">docs/logbook-entry-2026-04-28-0700.md</text:span></text:p>
        </text:section>
        <text:h text:style-name="P60" text:outline-level="1"><text:soft-page-break/>Compact Commit Message</text:h>
        <text:section text:style-name="Sect2" text:name="Section12">
          <text:p text:style-name="P35"><text:bookmark text:name="code-block-viewer Copy 10"/><text:span text:style-name="Source_20_Text">Initial V000 STEM research WordPress page structure</text:span></text:p>
        </text:section>
        <text:p text:style-name="P61"/>
        <text:p text:style-name="P9">Git commit script / upload sequence</text:p>
        <text:p text:style-name="Text_20_body"/>
        <text:h text:style-name="Heading_20_1" text:outline-level="1">Git Commit Script / Upload Sequence</text:h>
        <text:p text:style-name="Text_20_body">Use this from inside the repo folder:</text:p>
        <text:section text:style-name="Sect2" text:name="Section13">
          <text:p text:style-name="P31"><text:bookmark text:name="code-block-viewer Copy 11"/><text:span text:style-name="Source_20_Text">cd GGTC_INFO_STEM_RESEARCH_WEB_PAGE_V000</text:span></text:p>
          <text:p text:style-name="Preformatted_20_Text"><text:span text:style-name="Source_20_Text">git init</text:span></text:p>
          <text:p text:style-name="Preformatted_20_Text"><text:span text:style-name="Source_20_Text">git add README.md</text:span></text:p>
          <text:p text:style-name="Preformatted_20_Text"><text:span text:style-name="Source_20_Text">git add LICENSE_NOTICE.md</text:span></text:p>
          <text:p text:style-name="Preformatted_20_Text"><text:span text:style-name="Source_20_Text">git add CHANGELOG.md</text:span></text:p>
          <text:p text:style-name="Preformatted_20_Text"><text:span text:style-name="Source_20_Text">git add repo_manifest.md</text:span></text:p>
          <text:p text:style-name="Preformatted_20_Text"><text:span text:style-name="Source_20_Text">git add wordpress/custom-html-block.html</text:span></text:p>
          <text:p text:style-name="Preformatted_20_Text"><text:span text:style-name="Source_20_Text">git add wordpress/additional-css.css</text:span></text:p>
          <text:p text:style-name="Preformatted_20_Text"><text:span text:style-name="Source_20_Text">git add wordpress/wordpress-install-notes.md</text:span></text:p>
          <text:p text:style-name="Preformatted_20_Text"><text:span text:style-name="Source_20_Text">git add src/index.html</text:span></text:p>
          <text:p text:style-name="Preformatted_20_Text"><text:span text:style-name="Source_20_Text">git add src/styles.css</text:span></text:p>
          <text:p text:style-name="Preformatted_20_Text"><text:span text:style-name="Source_20_Text">git add docs/logbook-entry-2026-04-28-0700.md</text:span></text:p>
          <text:p text:style-name="Preformatted_20_Text"><text:span text:style-name="Source_20_Text">git add docs/author-profile-ethan-brooks.md</text:span></text:p>
          <text:p text:style-name="Preformatted_20_Text"><text:span text:style-name="Source_20_Text">git add docs/ggtc-network.md</text:span></text:p>
          <text:p text:style-name="Preformatted_20_Text"><text:span text:style-name="Source_20_Text">git add docs/deployment-notes.md</text:span></text:p>
          <text:p text:style-name="Preformatted_20_Text"><text:span text:style-name="Source_20_Text">git add assets/images/README.md</text:span></text:p>
          <text:p text:style-name="Preformatted_20_Text"><text:span text:style-name="Source_20_Text">git add assets/logos/README.md</text:span></text:p>
          <text:p text:style-name="Preformatted_20_Text"><text:span text:style-name="Source_20_Text">git add assets/screenshots/README.md</text:span></text:p>
          <text:p text:style-name="Preformatted_20_Text"><text:span text:style-name="Source_20_Text">git add archive/v000/original-working-draft.md</text:span></text:p>
          <text:p text:style-name="Preformatted_20_Text"><text:span text:style-name="Source_20_Text">git add archive/v000/wordpress-ready-copy.md</text:span></text:p>
          <text:p text:style-name="Preformatted_20_Text"><text:span text:style-name="Source_20_Text">git status</text:span></text:p>
          <text:p text:style-name="Preformatted_20_Text"><text:span text:style-name="Source_20_Text">git commit -m "Initial V000 STEM research WordPress page structure"</text:span></text:p>
          <text:p text:style-name="P32"><text:span text:style-name="Source_20_Text">git branch -M main</text:span></text:p>
        </text:section>
        <text:h text:style-name="P60" text:outline-level="1">GitHub Upload Sequence</text:h>
        <text:p text:style-name="Text_20_body">After creating the GitHub repo named:</text:p>
        <text:section text:style-name="Sect2" text:name="Section14">
          <text:p text:style-name="P35"><text:bookmark text:name="code-block-viewer Copy 12"/><text:span text:style-name="Source_20_Text">GGTC_INFO_STEM_RESEARCH_WEB_PAGE_V000</text:span></text:p>
        </text:section>
        <text:p text:style-name="P7">Run:</text:p>
        <text:section text:style-name="Sect2" text:name="Section15">
          <text:p text:style-name="P31"><text:bookmark text:name="code-block-viewer Copy 13"/><text:span text:style-name="Source_20_Text">git remote add origin https://github.com/YOUR-USERNAME/GGTC_INFO_STEM_RESEARCH_WEB_PAGE_V000.git</text:span></text:p>
          <text:p text:style-name="P32"><text:span text:style-name="Source_20_Text">git push -u origin main</text:span></text:p>
        </text:section>
        <text:h text:style-name="P60" text:outline-level="1">If You Already Initialized Git Before</text:h>
        <text:p text:style-name="Text_20_body">Use:</text:p>
        <text:section text:style-name="Sect2" text:name="Section16">
          <text:p text:style-name="P31"><text:bookmark text:name="code-block-viewer Copy 14"/><text:span text:style-name="Source_20_Text">git status</text:span></text:p>
          <text:p text:style-name="Preformatted_20_Text"><text:span text:style-name="Source_20_Text">git add .</text:span></text:p>
          <text:p text:style-name="Preformatted_20_Text"><text:span text:style-name="Source_20_Text">git commit -m "Update V000 STEM research WordPress page structure"</text:span></text:p>
          <text:p text:style-name="P32"><text:soft-page-break/><text:span text:style-name="Source_20_Text">git push</text:span></text:p>
        </text:section>
        <text:h text:style-name="P60" text:outline-level="1">Recommended First Commit Message</text:h>
        <text:section text:style-name="Sect2" text:name="Section17">
          <text:p text:style-name="P35"><text:bookmark text:name="code-block-viewer Copy 15"/><text:span text:style-name="Source_20_Text">Initial V000 STEM research WordPress page structure</text:span></text:p>
        </text:section>
        <text:p text:style-name="P61"/>
        <text:p text:style-name="P9">WordPress deployment workflow</text:p>
        <text:p text:style-name="Text_20_body"/>
        <text:h text:style-name="Heading_20_1" text:outline-level="1">WordPress Deployment Workflow</text:h>
        <text:h text:style-name="Heading_20_2" text:outline-level="2">1. Prepare repo files</text:h>
        <text:p text:style-name="Text_20_body">Use these two files:</text:p>
        <text:section text:style-name="Sect2" text:name="Section18">
          <text:p text:style-name="P31"><text:bookmark text:name="code-block-viewer Copy 16"/><text:span text:style-name="Source_20_Text">wordpress/custom-html-block.html</text:span></text:p>
          <text:p text:style-name="P32"><text:span text:style-name="Source_20_Text">wordpress/additional-css.css</text:span></text:p>
        </text:section>
        <text:p text:style-name="Horizontal_20_Line"/>
        <text:h text:style-name="Heading_20_2" text:outline-level="2">2. Create WordPress page</text:h>
        <text:p text:style-name="Text_20_body">In WordPress:</text:p>
        <text:section text:style-name="Sect2" text:name="Section19">
          <text:p text:style-name="P35"><text:bookmark text:name="code-block-viewer Copy 17"/><text:span text:style-name="Source_20_Text">Dashboard → Pages → Add New</text:span></text:p>
        </text:section>
        <text:p text:style-name="P7">Recommended page title:</text:p>
        <text:section text:style-name="Sect2" text:name="Section20">
          <text:p text:style-name="P35"><text:bookmark text:name="code-block-viewer Copy 18"/><text:span text:style-name="Source_20_Text">GGTC STEM Research</text:span></text:p>
        </text:section>
        <text:p text:style-name="P7">Recommended slug:</text:p>
        <text:section text:style-name="Sect2" text:name="Section21">
          <text:p text:style-name="P35"><text:bookmark text:name="code-block-viewer Copy 19"/><text:span text:style-name="Source_20_Text">ggtc-stem-research</text:span></text:p>
        </text:section>
        <text:p text:style-name="Horizontal_20_Line"/>
        <text:h text:style-name="Heading_20_2" text:outline-level="2">3. Set page layout</text:h>
        <text:p text:style-name="Text_20_body">In page settings, choose one if available:</text:p>
        <text:section text:style-name="Sect2" text:name="Section22">
          <text:p text:style-name="P31"><text:bookmark text:name="code-block-viewer Copy 20"/><text:span text:style-name="Source_20_Text">Full Width</text:span></text:p>
          <text:p text:style-name="Preformatted_20_Text"><text:span text:style-name="Source_20_Text">Canvas</text:span></text:p>
          <text:p text:style-name="Preformatted_20_Text"><text:span text:style-name="Source_20_Text">No Sidebar</text:span></text:p>
          <text:p text:style-name="P32"><text:span text:style-name="Source_20_Text">Blank Page</text:span></text:p>
        </text:section>
        <text:p text:style-name="P7">Best option: <text:span text:style-name="Strong_20_Emphasis">Full Width</text:span> or <text:span text:style-name="Strong_20_Emphasis">Canvas</text:span>.</text:p>
        <text:p text:style-name="Horizontal_20_Line"/>
        <text:h text:style-name="Heading_20_2" text:outline-level="2"><text:soft-page-break/>4. Add HTML</text:h>
        <text:p text:style-name="Text_20_body">In the page editor:</text:p>
        <text:section text:style-name="Sect2" text:name="Section23">
          <text:p text:style-name="P35"><text:bookmark text:name="code-block-viewer Copy 21"/><text:span text:style-name="Source_20_Text">+ Add Block → Custom HTML</text:span></text:p>
        </text:section>
        <text:p text:style-name="P7">Paste contents of:</text:p>
        <text:section text:style-name="Sect2" text:name="Section24">
          <text:p text:style-name="P35"><text:bookmark text:name="code-block-viewer Copy 22"/><text:span text:style-name="Source_20_Text">wordpress/custom-html-block.html</text:span></text:p>
        </text:section>
        <text:p text:style-name="P7">Then click:</text:p>
        <text:section text:style-name="Sect2" text:name="Section25">
          <text:p text:style-name="P35"><text:bookmark text:name="code-block-viewer Copy 23"/><text:span text:style-name="Source_20_Text">Preview</text:span></text:p>
        </text:section>
        <text:p text:style-name="Horizontal_20_Line"/>
        <text:h text:style-name="Heading_20_2" text:outline-level="2">5. Add CSS</text:h>
        <text:p text:style-name="Text_20_body">Go to:</text:p>
        <text:section text:style-name="Sect2" text:name="Section26">
          <text:p text:style-name="P35"><text:bookmark text:name="code-block-viewer Copy 24"/><text:span text:style-name="Source_20_Text">Appearance → Customize → Additional CSS</text:span></text:p>
        </text:section>
        <text:p text:style-name="P7">Paste contents of:</text:p>
        <text:section text:style-name="Sect2" text:name="Section27">
          <text:p text:style-name="P35"><text:bookmark text:name="code-block-viewer Copy 25"/><text:span text:style-name="Source_20_Text">wordpress/additional-css.css</text:span></text:p>
        </text:section>
        <text:p text:style-name="P7">Then click:</text:p>
        <text:section text:style-name="Sect2" text:name="Section28">
          <text:p text:style-name="P35"><text:bookmark text:name="code-block-viewer Copy 26"/><text:span text:style-name="Source_20_Text">Publish</text:span></text:p>
        </text:section>
        <text:p text:style-name="Horizontal_20_Line"/>
        <text:h text:style-name="Heading_20_2" text:outline-level="2">6. Publish page</text:h>
        <text:p text:style-name="Text_20_body">Return to the page editor.</text:p>
        <text:p text:style-name="Text_20_body">Click:</text:p>
        <text:section text:style-name="Sect2" text:name="Section29">
          <text:p text:style-name="P35"><text:bookmark text:name="code-block-viewer Copy 27"/><text:span text:style-name="Source_20_Text">Publish</text:span></text:p>
        </text:section>
        <text:p text:style-name="P7">Expected URL format:</text:p>
        <text:section text:style-name="Sect2" text:name="Section30">
          <text:p text:style-name="P35"><text:bookmark text:name="code-block-viewer Copy 28"/><text:span text:style-name="Source_20_Text">https://ggtc.info/ggtc-stem-research/</text:span></text:p>
        </text:section>
        <text:p text:style-name="Horizontal_20_Line"/>
        <text:h text:style-name="Heading_20_2" text:outline-level="2">7. Add internal links</text:h>
        <text:p text:style-name="Text_20_body">Add the new page link to:</text:p>
        <text:section text:style-name="Sect2" text:name="Section31">
          <text:p text:style-name="P31"><text:bookmark text:name="code-block-viewer Copy 29"/><text:span text:style-name="Source_20_Text">GGTC.info</text:span></text:p>
          <text:p text:style-name="Preformatted_20_Text"><text:span text:style-name="Source_20_Text">Quibhoball.com</text:span></text:p>
          <text:p text:style-name="Preformatted_20_Text"><text:span text:style-name="Source_20_Text">GGTCUNIVERSE.com</text:span></text:p>
          <text:p text:style-name="Preformatted_20_Text"><text:span text:style-name="Source_20_Text">GGTCPUBLISHING.com</text:span></text:p>
          <text:p text:style-name="P32"><text:span text:style-name="Source_20_Text">GGTCSTEMTRAINING.com</text:span></text:p>
        </text:section>
        <text:p text:style-name="Horizontal_20_Line"/>
        <text:h text:style-name="Heading_20_2" text:outline-level="2"><text:soft-page-break/>8. Update repo after deployment</text:h>
        <text:p text:style-name="Text_20_body">Create this file:</text:p>
        <text:section text:style-name="Sect2" text:name="Section32">
          <text:p text:style-name="P35"><text:bookmark text:name="code-block-viewer Copy 30"/><text:span text:style-name="Source_20_Text">docs/wordpress-deployment-log-2026-04-28-0700.md</text:span></text:p>
        </text:section>
        <text:p text:style-name="P7">Commit message:</text:p>
        <text:section text:style-name="Sect2" text:name="Section33">
          <text:p text:style-name="P35"><text:bookmark text:name="code-block-viewer Copy 31"/><text:span text:style-name="Source_20_Text">Add WordPress deployment workflow for GGTC STEM research page</text:span></text:p>
        </text:section>
        <text:p text:style-name="P7">Git commands:</text:p>
        <text:section text:style-name="Sect2" text:name="Section34">
          <text:p text:style-name="P31"><text:bookmark text:name="code-block-viewer Copy 32"/><text:span text:style-name="Source_20_Text">git add docs/wordpress-deployment-log-2026-04-28-0700.md</text:span></text:p>
          <text:p text:style-name="Preformatted_20_Text"><text:span text:style-name="Source_20_Text">git add wordpress/custom-html-block.html</text:span></text:p>
          <text:p text:style-name="Preformatted_20_Text"><text:span text:style-name="Source_20_Text">git add wordpress/additional-css.css</text:span></text:p>
          <text:p text:style-name="Preformatted_20_Text"><text:span text:style-name="Source_20_Text">git commit -m "Add WordPress deployment workflow for GGTC STEM research page"</text:span></text:p>
          <text:p text:style-name="P32"><text:span text:style-name="Source_20_Text">git push</text:span></text:p>
        </text:section>
        <text:p text:style-name="Horizontal_20_Line"/>
        <text:h text:style-name="Heading_20_2" text:outline-level="2">Deployment status label</text:h>
        <text:section text:style-name="Sect2" text:name="Section35">
          <text:p text:style-name="P35"><text:bookmark text:name="code-block-viewer Copy 33"/><text:span text:style-name="Source_20_Text">DEPLOYMENT READY — WORDPRESS CUSTOM HTML + SCOPED CSS</text:span></text:p>
        </text:section>
        <text:section text:style-name="Sect1" text:name="thread-bottom-container">
          <text:p text:style-name="P7"/>
          <text:section text:style-name="Sect1" text:name="thread-bottom">
            <text:p text:style-name="P7"/>
            <text:section text:style-name="Sect1" text:name="prompt-textarea">
              <text:p text:style-name="P7"/>
            </text:section>
          </text:section>
        </text:section>
      </text:section>
      <text:section text:style-name="Sect1" text:name="aria-notify-live-region-assertive">
        <text:p text:style-name="P62"><text:span text:style-name="Source_20_Text"/></text:p>
      </text:section>
      <text:section text:style-name="Sect1" text:name="aria-notify-live-region-polite">
        <text:p text:style-name="P1"/>
      </text:section>
      <text:p text:style-name="Standard"><draw:frame draw:style-name="fr1" draw:name="Object1" text:anchor-type="as-char" svg:width="0.0161in" svg:height="0.0161in" draw:z-index="0"><draw:floating-frame/></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2T00:21:20.782532432</meta:creation-date>
    <dc:date>2026-05-02T00:22:42.474044969</dc:date>
    <meta:editing-duration>PT1M11S</meta:editing-duration>
    <meta:editing-cycles>3</meta:editing-cycles>
    <meta:generator>LibreOffice/25.8.6.2$Linux_X86_64 LibreOffice_project/a46b460d1686bb49c718d2ef5f88b83ff2dc4981</meta:generator>
    <meta:print-date>2026-05-02T00:22:38.894266045</meta:print-date>
    <meta:printed-by>PDF files</meta:printed-by>
    <meta:document-statistic meta:table-count="2" meta:image-count="0" meta:object-count="1" meta:page-count="21" meta:paragraph-count="574" meta:word-count="2704" meta:character-count="18871" meta:non-whitespace-character-count="16806"/>
  </office:meta>
</office:document-meta>
</file>

<file path=VersionList.xml><?xml version="1.0" encoding="utf-8"?>
<VL:version-list xmlns:dc="http://purl.org/dc/elements/1.1/" xmlns:VL="http://openoffice.org/2001/versions-list">
  <VL:version-entry VL:title="Version1" VL:comment="GGTC_PUBLISHING_SERIES_ wordpress-deployment-log-2026-04-28-0700_V000" VL:creator="" dc:date-time="2026-05-02T00:22:30"/>
  <VL:version-entry VL:title="Version2" VL:comment="Automatically saved version" VL:creator="" dc:date-time="2026-05-02T00:22:43"/>
</VL:version-list>
</file>